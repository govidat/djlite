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30000005D426B79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47e3a" officeooo:paragraph-rsid="00047e3a"/>
    </style:style>
    <style:style style:name="P2" style:family="paragraph" style:parent-style-name="Standard">
      <style:text-properties officeooo:rsid="005ec4db" officeooo:paragraph-rsid="005ec4db"/>
    </style:style>
    <style:style style:name="P3" style:family="paragraph" style:parent-style-name="Standard">
      <style:text-properties officeooo:rsid="004475ac" officeooo:paragraph-rsid="004475ac"/>
    </style:style>
    <style:style style:name="P4" style:family="paragraph" style:parent-style-name="Standard">
      <style:text-properties officeooo:rsid="004ff056" officeooo:paragraph-rsid="004ff056"/>
    </style:style>
    <style:style style:name="P5" style:family="paragraph" style:parent-style-name="Standard">
      <style:text-properties officeooo:rsid="0007db7c" officeooo:paragraph-rsid="0007db7c"/>
    </style:style>
    <style:style style:name="P6" style:family="paragraph" style:parent-style-name="Standard">
      <style:text-properties officeooo:rsid="001d6a0f" officeooo:paragraph-rsid="001d6a0f"/>
    </style:style>
    <style:style style:name="P7" style:family="paragraph" style:parent-style-name="Standard">
      <style:text-properties officeooo:rsid="00070ba9" officeooo:paragraph-rsid="00070ba9"/>
    </style:style>
    <style:style style:name="P8" style:family="paragraph" style:parent-style-name="Standard">
      <style:text-properties officeooo:rsid="00020157" officeooo:paragraph-rsid="00020157"/>
    </style:style>
    <style:style style:name="P9" style:family="paragraph" style:parent-style-name="Standard">
      <style:text-properties officeooo:rsid="000630eb" officeooo:paragraph-rsid="000630eb"/>
    </style:style>
    <style:style style:name="P10" style:family="paragraph" style:parent-style-name="Standard">
      <style:text-properties officeooo:rsid="0003e9db" officeooo:paragraph-rsid="0003e9db"/>
    </style:style>
    <style:style style:name="P11" style:family="paragraph" style:parent-style-name="Standard">
      <style:text-properties officeooo:rsid="003883b4" officeooo:paragraph-rsid="003883b4"/>
    </style:style>
    <style:style style:name="P12" style:family="paragraph" style:parent-style-name="Standard">
      <style:text-properties officeooo:rsid="005d45dc" officeooo:paragraph-rsid="005d45dc"/>
    </style:style>
    <style:style style:name="P13" style:family="paragraph" style:parent-style-name="Standard">
      <style:text-properties officeooo:rsid="00040e04" officeooo:paragraph-rsid="00040e04"/>
    </style:style>
    <style:style style:name="P14" style:family="paragraph" style:parent-style-name="Standard">
      <style:text-properties officeooo:rsid="00306039" officeooo:paragraph-rsid="00306039"/>
    </style:style>
    <style:style style:name="P15" style:family="paragraph" style:parent-style-name="Standard">
      <style:text-properties officeooo:rsid="000fee2b" officeooo:paragraph-rsid="000fee2b"/>
    </style:style>
    <style:style style:name="P16" style:family="paragraph" style:parent-style-name="Standard">
      <style:text-properties officeooo:rsid="000fee2b" officeooo:paragraph-rsid="00561224"/>
    </style:style>
    <style:style style:name="P17" style:family="paragraph" style:parent-style-name="Standard">
      <style:paragraph-properties fo:break-before="page"/>
      <style:text-properties officeooo:rsid="000931e6" officeooo:paragraph-rsid="000931e6"/>
    </style:style>
    <style:style style:name="P18" style:family="paragraph" style:parent-style-name="Standard">
      <style:text-properties officeooo:rsid="000931e6" officeooo:paragraph-rsid="000931e6"/>
    </style:style>
    <style:style style:name="P19" style:family="paragraph" style:parent-style-name="Heading_20_1">
      <style:text-properties officeooo:rsid="000931e6" officeooo:paragraph-rsid="000931e6"/>
    </style:style>
    <style:style style:name="P20" style:family="paragraph" style:parent-style-name="Text_20_body">
      <style:text-properties officeooo:rsid="000931e6" officeooo:paragraph-rsid="000931e6"/>
    </style:style>
    <style:style style:name="P21" style:family="paragraph" style:parent-style-name="Standard">
      <style:text-properties officeooo:rsid="0007db7c" officeooo:paragraph-rsid="000931e6"/>
    </style:style>
    <style:style style:name="P22" style:family="paragraph" style:parent-style-name="Standard">
      <style:text-properties officeooo:rsid="0009fd4b" officeooo:paragraph-rsid="0009fd4b"/>
    </style:style>
    <style:style style:name="P23" style:family="paragraph" style:parent-style-name="Standard">
      <style:text-properties officeooo:paragraph-rsid="00244367"/>
    </style:style>
    <style:style style:name="P24" style:family="paragraph" style:parent-style-name="Standard">
      <style:text-properties fo:color="#18b2b2" loext:opacity="100%" style:font-name="monospace" officeooo:paragraph-rsid="00244367" fo:background-color="#ffffff"/>
    </style:style>
    <style:style style:name="P25" style:family="paragraph" style:parent-style-name="Preformatted_20_Text">
      <style:text-properties fo:color="#18b2b2" loext:opacity="100%" style:font-name="monospace" officeooo:paragraph-rsid="00244367" fo:background-color="#ffffff"/>
    </style:style>
    <style:style style:name="P26" style:family="paragraph" style:parent-style-name="Preformatted_20_Text">
      <style:text-properties fo:color="#18b2b2" loext:opacity="100%" style:font-name="monospace" fo:background-color="#ffffff"/>
    </style:style>
    <style:style style:name="P27" style:family="paragraph" style:parent-style-name="Preformatted_20_Text">
      <style:paragraph-properties fo:margin-top="0in" fo:margin-bottom="0.1965in" style:contextual-spacing="false"/>
      <style:text-properties fo:color="#18b2b2" loext:opacity="100%" style:font-name="monospace" fo:background-color="#ffffff"/>
    </style:style>
    <style:style style:name="P28" style:family="paragraph" style:parent-style-name="Standard">
      <style:text-properties style:font-name="monospace" officeooo:paragraph-rsid="00244367"/>
    </style:style>
    <style:style style:name="P29" style:family="paragraph" style:parent-style-name="Heading_20_1">
      <style:text-properties officeooo:rsid="000a880c" officeooo:paragraph-rsid="000a880c"/>
    </style:style>
    <style:style style:name="P30" style:family="paragraph" style:parent-style-name="Text_20_body">
      <style:text-properties officeooo:rsid="000a880c" officeooo:paragraph-rsid="000a880c"/>
    </style:style>
    <style:style style:name="P31" style:family="paragraph" style:parent-style-name="Standard">
      <style:text-properties officeooo:rsid="00047e3a" officeooo:paragraph-rsid="000a880c"/>
    </style:style>
    <style:style style:name="P32" style:family="paragraph" style:parent-style-name="Heading_20_1">
      <style:text-properties officeooo:rsid="00186e90" officeooo:paragraph-rsid="00186e90"/>
    </style:style>
    <style:style style:name="P33" style:family="paragraph" style:parent-style-name="Text_20_body">
      <style:text-properties officeooo:rsid="00186e90" officeooo:paragraph-rsid="00186e90"/>
    </style:style>
    <style:style style:name="P34" style:family="paragraph" style:parent-style-name="Heading_20_1">
      <style:text-properties officeooo:rsid="0019933b" officeooo:paragraph-rsid="0019933b"/>
    </style:style>
    <style:style style:name="P35" style:family="paragraph" style:parent-style-name="Text_20_body">
      <style:text-properties officeooo:rsid="0019933b" officeooo:paragraph-rsid="0019933b"/>
    </style:style>
    <style:style style:name="P36" style:family="paragraph" style:parent-style-name="Text_20_body">
      <style:text-properties officeooo:rsid="001b7ef2" officeooo:paragraph-rsid="001b7ef2"/>
    </style:style>
    <style:style style:name="P37" style:family="paragraph" style:parent-style-name="Preformatted_20_Text">
      <style:text-properties officeooo:rsid="001b7ef2" officeooo:paragraph-rsid="001b7ef2"/>
    </style:style>
    <style:style style:name="P38" style:family="paragraph" style:parent-style-name="Text_20_body">
      <style:text-properties officeooo:rsid="001c775a" officeooo:paragraph-rsid="001c775a"/>
    </style:style>
    <style:style style:name="P39" style:family="paragraph" style:parent-style-name="Text_20_body">
      <style:text-properties officeooo:rsid="001deb41" officeooo:paragraph-rsid="001deb41"/>
    </style:style>
    <style:style style:name="P40" style:family="paragraph" style:parent-style-name="Text_20_body">
      <style:text-properties officeooo:paragraph-rsid="001deb41"/>
    </style:style>
    <style:style style:name="P41" style:family="paragraph" style:parent-style-name="Text_20_body">
      <style:text-properties officeooo:paragraph-rsid="001effd9"/>
    </style:style>
    <style:style style:name="P42" style:family="paragraph" style:parent-style-name="Preformatted_20_Text">
      <style:paragraph-properties fo:margin-top="0in" fo:margin-bottom="0.0972in" style:contextual-spacing="false" fo:line-height="115%"/>
    </style:style>
    <style:style style:name="P43" style:family="paragraph" style:parent-style-name="Text_20_body">
      <style:text-properties officeooo:rsid="001effd9" officeooo:paragraph-rsid="001effd9"/>
    </style:style>
    <style:style style:name="P44" style:family="paragraph" style:parent-style-name="Text_20_body">
      <style:text-properties fo:color="#569cd6" loext:opacity="100%" officeooo:rsid="001effd9" officeooo:paragraph-rsid="001effd9"/>
    </style:style>
    <style:style style:name="P45" style:family="paragraph" style:parent-style-name="Standard">
      <style:text-properties officeooo:rsid="001effd9" officeooo:paragraph-rsid="001effd9"/>
    </style:style>
    <style:style style:name="P46" style:family="paragraph" style:parent-style-name="Preformatted_20_Text">
      <style:text-properties officeooo:rsid="001effd9" officeooo:paragraph-rsid="001effd9"/>
    </style:style>
    <style:style style:name="P47" style:family="paragraph" style:parent-style-name="Heading_20_1">
      <style:text-properties officeooo:rsid="0033a23a" officeooo:paragraph-rsid="0033a23a"/>
    </style:style>
    <style:style style:name="P48" style:family="paragraph" style:parent-style-name="Text_20_body">
      <style:text-properties officeooo:paragraph-rsid="0033a23a"/>
    </style:style>
    <style:style style:name="P49" style:family="paragraph" style:parent-style-name="Text_20_body">
      <style:text-properties officeooo:rsid="0033f581" officeooo:paragraph-rsid="0033f581"/>
    </style:style>
    <style:style style:name="P50" style:family="paragraph" style:parent-style-name="Text_20_body">
      <style:text-properties officeooo:rsid="0034c3f1" officeooo:paragraph-rsid="0034c3f1"/>
    </style:style>
    <style:style style:name="P51" style:family="paragraph" style:parent-style-name="Text_20_body">
      <style:text-properties officeooo:rsid="0038f4b8" officeooo:paragraph-rsid="0038f4b8"/>
    </style:style>
    <style:style style:name="P52" style:family="paragraph" style:parent-style-name="Text_20_body">
      <style:text-properties officeooo:rsid="0034c3f1" officeooo:paragraph-rsid="0038f4b8"/>
    </style:style>
    <style:style style:name="P53" style:family="paragraph" style:parent-style-name="Preformatted_20_Text">
      <style:text-properties officeooo:rsid="0034c3f1" officeooo:paragraph-rsid="0038f4b8"/>
    </style:style>
    <style:style style:name="P54" style:family="paragraph" style:parent-style-name="Text_20_body">
      <style:text-properties officeooo:rsid="00361ad2" officeooo:paragraph-rsid="00361ad2"/>
    </style:style>
    <style:style style:name="P55" style:family="paragraph" style:parent-style-name="Text_20_body">
      <style:text-properties officeooo:rsid="003883b4" officeooo:paragraph-rsid="003883b4"/>
    </style:style>
    <style:style style:name="P56" style:family="paragraph" style:parent-style-name="Heading_20_1">
      <style:text-properties officeooo:rsid="003cbd44" officeooo:paragraph-rsid="003cbd44"/>
    </style:style>
    <style:style style:name="P57" style:family="paragraph" style:parent-style-name="Text_20_body">
      <style:text-properties officeooo:paragraph-rsid="003cbd44"/>
    </style:style>
    <style:style style:name="P58" style:family="paragraph" style:parent-style-name="Text_20_body">
      <style:text-properties officeooo:rsid="003cbd44" officeooo:paragraph-rsid="003cbd44"/>
    </style:style>
    <style:style style:name="P59" style:family="paragraph" style:parent-style-name="Text_20_body">
      <style:text-properties officeooo:rsid="003cbd44" officeooo:paragraph-rsid="003da6c0"/>
    </style:style>
    <style:style style:name="P60" style:family="paragraph" style:parent-style-name="Text_20_body">
      <style:text-properties officeooo:rsid="004870ac" officeooo:paragraph-rsid="004870ac"/>
    </style:style>
    <style:style style:name="P61" style:family="paragraph" style:parent-style-name="Heading_20_1">
      <style:text-properties officeooo:rsid="003e47f0" officeooo:paragraph-rsid="003e47f0"/>
    </style:style>
    <style:style style:name="P62" style:family="paragraph" style:parent-style-name="Text_20_body">
      <style:text-properties officeooo:rsid="0044a79c" officeooo:paragraph-rsid="0044a79c"/>
    </style:style>
    <style:style style:name="P63" style:family="paragraph" style:parent-style-name="Text_20_body">
      <style:text-properties officeooo:rsid="003da6c0" officeooo:paragraph-rsid="0044a79c"/>
    </style:style>
    <style:style style:name="P64" style:family="paragraph" style:parent-style-name="Heading_20_2">
      <style:text-properties officeooo:rsid="003e47f0" officeooo:paragraph-rsid="003e47f0"/>
    </style:style>
    <style:style style:name="P65" style:family="paragraph" style:parent-style-name="Text_20_body">
      <style:text-properties officeooo:rsid="0044d2b7" officeooo:paragraph-rsid="0044d2b7"/>
    </style:style>
    <style:style style:name="P66" style:family="paragraph" style:parent-style-name="Heading_20_1">
      <style:text-properties officeooo:rsid="0044d2b7" officeooo:paragraph-rsid="0044d2b7"/>
    </style:style>
    <style:style style:name="P67" style:family="paragraph" style:parent-style-name="Quotations">
      <style:paragraph-properties fo:margin-top="0in" fo:margin-bottom="0.0972in" style:contextual-spacing="false" fo:line-height="115%"/>
      <style:text-properties officeooo:rsid="0044d2b7"/>
    </style:style>
    <style:style style:name="P68" style:family="paragraph" style:parent-style-name="Heading_20_2">
      <style:text-properties officeooo:rsid="004870ac" officeooo:paragraph-rsid="004870ac"/>
    </style:style>
    <style:style style:name="P69" style:family="paragraph" style:parent-style-name="Text_20_body">
      <style:text-properties officeooo:rsid="004a959c" officeooo:paragraph-rsid="004a959c"/>
    </style:style>
    <style:style style:name="P70" style:family="paragraph" style:parent-style-name="Text_20_body">
      <style:text-properties officeooo:rsid="004ca9c6" officeooo:paragraph-rsid="004ca9c6"/>
    </style:style>
    <style:style style:name="P71" style:family="paragraph" style:parent-style-name="Text_20_body">
      <style:text-properties officeooo:rsid="00533e6d" officeooo:paragraph-rsid="00533e6d"/>
    </style:style>
    <style:style style:name="P72" style:family="paragraph" style:parent-style-name="Text_20_body">
      <style:text-properties officeooo:rsid="00523bba" officeooo:paragraph-rsid="00523bba"/>
    </style:style>
    <style:style style:name="P73" style:family="paragraph" style:parent-style-name="Heading_20_2">
      <style:paragraph-properties fo:margin-top="0in" fo:margin-bottom="0in" style:contextual-spacing="false"/>
    </style:style>
    <style:style style:name="P74" style:family="paragraph" style:parent-style-name="Text_20_body">
      <style:text-properties officeooo:rsid="0054f94d" officeooo:paragraph-rsid="0054f94d"/>
    </style:style>
    <style:style style:name="P75" style:family="paragraph" style:parent-style-name="Text_20_body">
      <style:text-properties officeooo:rsid="005836c6" officeooo:paragraph-rsid="005836c6"/>
    </style:style>
    <style:style style:name="T1" style:family="text">
      <style:text-properties officeooo:rsid="00054c65"/>
    </style:style>
    <style:style style:name="T2" style:family="text">
      <style:text-properties officeooo:rsid="00306039"/>
    </style:style>
    <style:style style:name="T3" style:family="text">
      <style:text-properties officeooo:rsid="003ad1ed"/>
    </style:style>
    <style:style style:name="T4" style:family="text">
      <style:text-properties officeooo:rsid="00186e90"/>
    </style:style>
    <style:style style:name="T5" style:family="text">
      <style:text-properties officeooo:rsid="00560443"/>
    </style:style>
    <style:style style:name="T6" style:family="text">
      <style:text-properties officeooo:rsid="005d45dc"/>
    </style:style>
    <style:style style:name="T7" style:family="text">
      <style:text-properties fo:color="#000000" loext:opacity="100%" style:font-name="monospace" fo:background-color="#ffffff" loext:char-shading-value="0"/>
    </style:style>
    <style:style style:name="T8" style:family="text">
      <style:text-properties fo:color="#18b2b2" loext:opacity="100%" style:font-name="monospace" fo:background-color="#ffffff" loext:char-shading-value="0"/>
    </style:style>
    <style:style style:name="T9" style:family="text">
      <style:text-properties fo:color="#18b2b2" loext:opacity="100%" style:font-name="monospace" style:text-underline-style="solid" style:text-underline-width="auto" style:text-underline-color="font-color" fo:background-color="#ffffff" loext:char-shading-value="0"/>
    </style:style>
    <style:style style:name="T10" style:family="text">
      <style:text-properties style:font-name="monospace"/>
    </style:style>
    <style:style style:name="T11" style:family="text">
      <style:text-properties officeooo:rsid="000a880c"/>
    </style:style>
    <style:style style:name="T12" style:family="text">
      <style:text-properties fo:color="#000080" loext:opacity="100%" style:font-name="monospace" fo:background-color="#ffffff" loext:char-shading-value="0"/>
    </style:style>
    <style:style style:name="T13" style:family="text">
      <style:text-properties officeooo:rsid="000bfa50"/>
    </style:style>
    <style:style style:name="T14" style:family="text">
      <style:text-properties officeooo:rsid="001deb41"/>
    </style:style>
    <style:style style:name="T15" style:family="text">
      <style:text-properties officeooo:rsid="001effd9"/>
    </style:style>
    <style:style style:name="T16" style:family="text">
      <style:text-properties officeooo:rsid="003da6c0"/>
    </style:style>
    <style:style style:name="T17" style:family="text">
      <style:text-properties officeooo:rsid="004870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d Documents/learning/djlite/</text:p>
      <text:p text:style-name="P1">source /home/govidat/Documents/learning/djlite/.venv/bin/activate.fish</text:p>
      <text:p text:style-name="P1">python manage.py tailwind dev</text:p>
      <text:p text:style-name="P2"/>
      <text:p text:style-name="P2">Option 2 in Two Tabs to see debug outputs:</text:p>
      <text:p text:style-name="P2">Terminal 1 — Django server (your print statements appear here):</text:p>
      <text:p text:style-name="P2">source .venv/bin/activate</text:p>
      <text:p text:style-name="P2">python manage.py runserver</text:p>
      <text:p text:style-name="P2"/>
      <text:p text:style-name="P2">Terminal 2 — Tailwind watcher:</text:p>
      <text:p text:style-name="P2">source .venv/bin/activate</text:p>
      <text:p text:style-name="P2">python manage.py tailwind start</text:p>
      <text:p text:style-name="P2"/>
      <text:p text:style-name="P3">for using ORM</text:p>
      <text:p text:style-name="P3">python manage.py runscript orm_script</text:p>
      <text:p text:style-name="P3">python manage.py shell_plus –print-sql</text:p>
      <text:p text:style-name="P3"/>
      <text:p text:style-name="P4">for using bulk_upload</text:p>
      <text:p text:style-name="P1">python manage.py bulk_upload data.json</text:p>
      <text:p text:style-name="P1"/>
      <text:p text:style-name="P1"/>
      <text:p text:style-name="P5">Setting up github</text:p>
      <text:p text:style-name="P5"/>
      <text:p text:style-name="P5">ssh keys for git-push</text:p>
      <text:p text:style-name="P5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5"/>
      <text:p text:style-name="P1"/>
      <text:p text:style-name="P1">Working in a venv</text:p>
      <text:p text:style-name="P1"/>
      <text:p text:style-name="P1">1. Installed uv &gt; pip install uv</text:p>
      <text:p text:style-name="P1">2. In the folder of the project</text:p>
      <text:p text:style-name="P1"><text:tab/>uv venv</text:p>
      <text:p text:style-name="P1">3. To activate the venv &gt; source .venv/bin/activate.fish</text:p>
      <text:p text:style-name="P1">4. requirements.txt to contain the required versions of python packages &gt;</text:p>
      <text:p text:style-name="P1"><text:tab/>uv pip install -r requirements.txt<text:tab/></text:p>
      <text:p text:style-name="P1">5. <text:span text:style-name="T1">uv pip list – gives the list of packages installed</text:span></text:p>
      <text:p text:style-name="P6">6. django-admin startproject xxx . <text:s/>(this . Install the project in the same folder)</text:p>
      <text:p text:style-name="P1"/>
      <text:p text:style-name="P7">To clone a git repo</text:p>
      <text:p text:style-name="P7"/>
      <text:p text:style-name="P7">git clone …. (this will create a directory and put the content there)</text:p>
      <text:p text:style-name="P7"/>
      <text:p text:style-name="P8"/>
      <text:p text:style-name="P8">Guiding principles</text:p>
      <text:p text:style-name="P8"/>
      <text:p text:style-name="P9">0. working in venv</text:p>
      <text:p text:style-name="P10">1. Database = <text:span text:style-name="T2">default sqllite</text:span></text:p>
      <text:p text:style-name="P10">2. Template engine = <text:span text:style-name="T2">Default DTL; </text:span><text:span text:style-name="T3">Jinja2 is tried to handle nested dictionary in template</text:span></text:p>
      <text:p text:style-name="P10"><text:soft-page-break/>3. Daisy UI + Tailwind.</text:p>
      <text:p text:style-name="P10">4. Authentication? <text:span text:style-name="T4">Django-allauth </text:span><text:span text:style-name="T5">+ Django-allauth-ui</text:span></text:p>
      <text:p text:style-name="P10">5. Datastar for dynamic templates (instead of HTMX + Alpine.js) – <text:span text:style-name="T6">This is dropped for time being.</text:span></text:p>
      <text:p text:style-name="P11">6. Django-cotton templating engine</text:p>
      <text:p text:style-name="P12">7. HTMX for dynamic templates</text:p>
      <text:p text:style-name="P11"/>
      <text:p text:style-name="P13"><text:span text:style-name="T7">uv </text:span><text:span text:style-name="T8">pip install -r </text:span><text:span text:style-name="T9">requirements.txt</text:span><text:span text:style-name="T10"><text:line-break/></text:span>6. i18n </text:p>
      <text:p text:style-name="P13"/>
      <text:p text:style-name="P14">Working in venv only.</text:p>
      <text:p text:style-name="P14"/>
      <text:p text:style-name="P15">requirements.txt</text:p>
      <text:p text:style-name="P15"><text:tab/></text:p>
      <text:p text:style-name="P16">Django==5.2.4</text:p>
      <text:p text:style-name="P16">django-allauth==65.10.0</text:p>
      <text:p text:style-name="P16">django-tailwind==4.2.0 # tailwind</text:p>
      <text:p text:style-name="P16">django-browser-reload==1.18.0 # tailwind</text:p>
      <text:p text:style-name="P16">cookiecutter&gt;=1.7.0 # tailwind</text:p>
      <text:p text:style-name="P16">honcho==2.0.0 <text:s text:c="2"/># tailwind</text:p>
      <text:p text:style-name="P16">django-cotton==2.1.3 # cotton</text:p>
      <text:p text:style-name="P16"># jinja2==3.1.6</text:p>
      <text:p text:style-name="P16">django-debug-toolbar==6.0.0 # debug-toolbar</text:p>
      <text:p text:style-name="P16">django-admin-sortable2==2.2.8 #admin-sortable2</text:p>
      <text:p text:style-name="P16">django-extensions==4.1 # this is for things like orm query</text:p>
      <text:p text:style-name="P16">django-nested-admin==4.1.6 # this is for multi level nested inline</text:p>
      <text:p text:style-name="P16"># datastar-py==0.8.0 # this is for datastar BUT NOT WORKING PROPERLY DROPPED FOR THE TIME BEING</text:p>
      <text:p text:style-name="P16">django-modeltranslation==0.20.2 # this is for adding _en fileds in the same table</text:p>
      <text:p text:style-name="P16">django-allauth-ui==1.8.1 <text:s/># this is to provide additional ui for allauth<text:tab/></text:p>
      <text:p text:style-name="P17">Project : mydjango</text:p>
      <text:p text:style-name="P18"/>
      <text:h text:style-name="P19" text:outline-level="1"><text:span text:style-name="T11">Reference Starter </text:span>Documents</text:h>
      <text:p text:style-name="P20">This is based on djangoproject tutorial and mdn tutorial</text:p>
      <text:p text:style-name="P20"><text:a xlink:type="simple" xlink:href="https://docs.djangoproject.com/en/5.2/intro/tutorial01/" text:style-name="Internet_20_link" text:visited-style-name="Visited_20_Internet_20_Link">https://docs.djangoproject.com/en/5.2/intro/tutorial01/</text:a></text:p>
      <text:p text:style-name="P20">https://developer.mozilla.org/en-US/docs/Learn_web_development/Extensions/Server-side/Django/development_environment</text:p>
      <text:h text:style-name="P19" text:outline-level="1">GIT Setting</text:h>
      <text:p text:style-name="P20">Account in github.com</text:p>
      <text:p text:style-name="P20">Setup ssh keys for this Account:</text:p>
      <text:p text:style-name="P21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21"/>
      <text:p text:style-name="P18">Add a new Repository: mydjango</text:p>
      <text:p text:style-name="P18"/>
      <text:p text:style-name="P18">Refer MDN document for the steps.</text:p>
      <text:p text:style-name="P18"/>
      <text:p text:style-name="P22">Also added: (for setting up remote SSH keys)</text:p>
      <text:p text:style-name="P23"><text:span text:style-name="T7">git </text:span><text:span text:style-name="T8">remote add origin </text:span><text:a xlink:type="simple" xlink:href="mailto:git@github.com" text:style-name="Internet_20_link" text:visited-style-name="Visited_20_Internet_20_Link"><text:span text:style-name="T12">git@github.com</text:span></text:a><text:span text:style-name="T8">:govidat/mydjango.git</text:span></text:p>
      <text:p text:style-name="P24"/>
      <text:p text:style-name="P25"><text:span text:style-name="Source_20_Text"># Get the current source from GitHub on the main branch</text:span></text:p>
      <text:p text:style-name="P26"><text:span text:style-name="Source_20_Text">git checkout main</text:span></text:p>
      <text:p text:style-name="P26"><text:span text:style-name="Source_20_Text">git pull origin main</text:span></text:p>
      <text:p text:style-name="P26"/>
      <text:p text:style-name="P26"><text:span text:style-name="Source_20_Text"># Create a branch and add/commit your newly created app skeleton</text:span></text:p>
      <text:p text:style-name="P26"><text:span text:style-name="Source_20_Text">git checkout -b skeleton_website # Create and activate a new branch "skeleton_website"</text:span></text:p>
      <text:p text:style-name="P26"><text:span text:style-name="Source_20_Text">git add -A # Add all changed files to the staging area</text:span></text:p>
      <text:p text:style-name="P26"><text:span text:style-name="Source_20_Text">git commit -m "Create Skeleton framework for LocalLibrary" # Commit the changed files</text:span></text:p>
      <text:p text:style-name="P26"/>
      <text:p text:style-name="P26"><text:span text:style-name="Source_20_Text"># Push the branch to GitHub</text:span></text:p>
      <text:p text:style-name="P27"><text:span text:style-name="Source_20_Text">git push origin skeleton_website</text:span></text:p>
      <text:p text:style-name="P28"><text:line-break/></text:p>
      <text:h text:style-name="P29" text:outline-level="1">Project Setup <text:span text:style-name="T13">in venv</text:span></text:h>
      <text:p text:style-name="P30">Requirements.txt</text:p>
      <text:p text:style-name="P30">In the mydjango folder, create a requirements.txt file and add </text:p>
      <text:p text:style-name="P30"><text:tab/>Django==5.2.4</text:p>
      <text:p text:style-name="P31"><text:soft-page-break/>In the folder of the project</text:p>
      <text:p text:style-name="P31"><text:tab/>uv venv</text:p>
      <text:p text:style-name="P31">3. To activate the venv &gt; source .venv/bin/activate.fish</text:p>
      <text:p text:style-name="P31">4. requirements.txt to contain the required versions of python packages &gt;</text:p>
      <text:p text:style-name="P31"><text:tab/>uv pip install -r requirements.txt<text:tab/></text:p>
      <text:p text:style-name="P31">5. <text:span text:style-name="T1">uv pip list – gives the list of packages installed</text:span></text:p>
      <text:p text:style-name="P31"/>
      <text:h text:style-name="P32" text:outline-level="1">Django-allauth</text:h>
      <text:p text:style-name="P33">Link: <text:a xlink:type="simple" xlink:href="https://learndjango.com/tutorials/django-allauth-tutorial" text:style-name="Internet_20_link" text:visited-style-name="Visited_20_Internet_20_Link">https://learndjango.com/tutorials/django-allauth-tutorial</text:a></text:p>
      <text:p text:style-name="P33"/>
      <text:h text:style-name="P34" text:outline-level="1">i18n</text:h>
      <text:p text:style-name="P35">Link: <text:a xlink:type="simple" xlink:href="https://lokalise.com/blog/django-i18n-beginners-guide/" text:style-name="Internet_20_link" text:visited-style-name="Visited_20_Internet_20_Link">https://lokalise.com/blog/django-i18n-beginners-guide/</text:a></text:p>
      <text:p text:style-name="P35"/>
      <text:p text:style-name="P36">Additional packages:</text:p>
      <text:p text:style-name="P37"><text:span text:style-name="Source_20_Text">msguniq --help</text:span></text:p>
      <text:p text:style-name="P36"/>
      <text:p text:style-name="P36">This installed some prereq.</text:p>
      <text:p text:style-name="P38">Also added a Directory called “locale” at appropriate place.</text:p>
      <text:p text:style-name="P39">settings.py</text:p>
      <text:p text:style-name="P40"><text:span text:style-name="T14"><text:tab/></text:span><text:span text:style-name="Source_20_Text">USE_I18N = True</text:span></text:p>
      <text:p text:style-name="P40"><text:span text:style-name="Source_20_Text"><text:tab/>LANGUAGE_CODE = 'en'</text:span></text:p>
      <text:p text:style-name="P40"><text:span text:style-name="Source_20_Text"><text:tab/>LANGUAGES = [</text:span></text:p>
      <text:p text:style-name="Standard"><text:tab/><text:tab/>('en', 'English'),</text:p>
      <text:p text:style-name="Standard"><text:tab/><text:tab/>('lv', 'Latvian'),</text:p>
      <text:p text:style-name="Standard"><text:tab/><text:tab/>]</text:p>
      <text:p text:style-name="P41"><text:span text:style-name="Source_20_Text"><text:tab/>MIDDLEWARE = [</text:span></text:p>
      <text:p text:style-name="P42"><text:s text:c="4"/>'django.middleware.security.SecurityMiddleware',</text:p>
      <text:p text:style-name="P42"><text:s text:c="4"/>'django.contrib.sessions.middleware.SessionMiddleware',</text:p>
      <text:p text:style-name="P42"><text:s text:c="4"/>'django.middleware.locale.LocaleMiddleware', # &lt;=== add this</text:p>
      <text:p text:style-name="P41"><text:span text:style-name="Source_20_Text"/></text:p>
      <text:p text:style-name="P41"><text:span text:style-name="Source_20_Text"><text:span text:style-name="T15">views.py</text:span></text:span></text:p>
      <text:p text:style-name="P41"><text:span text:style-name="Source_20_Text"><text:tab/>from django.utils.translation import gettext</text:span></text:p>
      <text:p text:style-name="P43">in base.html to switch language:</text:p>
      <text:p text:style-name="P43"><text:soft-page-break/>first line: <text:s/>{% load i18n %}</text:p>
      <text:p text:style-name="P43">Middle part</text:p>
      <text:p text:style-name="P44"/>
      <text:p text:style-name="P43"><text:s text:c="7"/>&lt;form method="post" action="{% url 'set_language' %}"&gt;</text:p>
      <text:p text:style-name="P43"><text:s text:c="12"/>{% csrf_token %}</text:p>
      <text:p text:style-name="P43"><text:s text:c="12"/>&lt;label for="language-select"&gt;Choose your language:&lt;/label&gt;</text:p>
      <text:p text:style-name="P43"><text:s text:c="12"/>{% get_current_language as current_language %}</text:p>
      <text:p text:style-name="P43"><text:s text:c="12"/>&lt;select id="language-select" name="language"&gt;</text:p>
      <text:p text:style-name="P43"><text:s text:c="12"/>&lt;option value="en" {% if current_language == "en" %}selected{% endif %}&gt;English&lt;/option&gt;</text:p>
      <text:p text:style-name="P43"><text:s text:c="12"/>&lt;option value="lv" {% if current_language == "lv" %}selected{% endif %}&gt;Latvian&lt;/option&gt;</text:p>
      <text:p text:style-name="P43"><text:s text:c="12"/>&lt;/select&gt;</text:p>
      <text:p text:style-name="P43"><text:s text:c="12"/>&lt;button type="submit"&gt;Switch&lt;/button&gt;</text:p>
      <text:p text:style-name="P43"><text:s text:c="8"/>&lt;/form&gt;</text:p>
      <text:p text:style-name="P36"/>
      <text:p text:style-name="P36"/>
      <text:p text:style-name="P43">For setting up po and mo files:</text:p>
      <text:p text:style-name="P45">python manage.py makemessages -l en</text:p>
      <text:p text:style-name="P43"/>
      <text:p text:style-name="P43">After editing po files:</text:p>
      <text:p text:style-name="P46">python manage.py compilemessages</text:p>
      <text:p text:style-name="P43"/>
      <text:h text:style-name="P47" text:outline-level="1">django-tailwind</text:h>
      <text:p text:style-name="P48"/>
      <text:p text:style-name="P48"><text:a xlink:type="simple" xlink:href="https://github.com/timonweb/django-tailwind" text:style-name="Internet_20_link" text:visited-style-name="Visited_20_Internet_20_Link">https://github.com/timonweb/django-tailwind</text:a></text:p>
      <text:p text:style-name="P48"/>
      <text:p text:style-name="P49">node js to be available in the machine</text:p>
      <text:p text:style-name="P50">After all the setup we have to run:</text:p>
      <text:p text:style-name="P51">Also ran </text:p>
      <text:p text:style-name="P52">python manage.py tailwind plugin_install @tailwindcss/typography</text:p>
      <text:p text:style-name="P53">python manage.py tailwind plugin_install @tailwindcss/forms</text:p>
      <text:p text:style-name="P51"><text:soft-page-break/>then run</text:p>
      <text:p text:style-name="P52"/>
      <text:p text:style-name="P50">$ python manage.py tailwind dev </text:p>
      <text:p text:style-name="P50">this runs both tailwind and the django server….</text:p>
      <text:p text:style-name="P50"/>
      <text:p text:style-name="P54">Use templates from </text:p>
      <text:p text:style-name="P54"><text:a xlink:type="simple" xlink:href="https://flowbite.com/" text:style-name="Internet_20_link" text:visited-style-name="Visited_20_Internet_20_Link">https://flowbite.com/</text:a></text:p>
      <text:p text:style-name="P54"/>
      <text:h text:style-name="Heading_20_1" text:outline-level="1">django-cotton</text:h>
      <text:p text:style-name="P55">From django packages</text:p>
      <text:p text:style-name="P55"/>
      <text:h text:style-name="Heading_20_1" text:outline-level="1">Customize daisy tailwind</text:h>
      <text:p text:style-name="P55"><text:a xlink:type="simple" xlink:href="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" text:style-name="Internet_20_link" text:visited-style-name="Visited_20_Internet_20_Link">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</text:a></text:p>
      <text:p text:style-name="P55"/>
      <text:h text:style-name="P56" text:outline-level="1"><draw:frame draw:style-name="fr1" draw:name="Image1" text:anchor-type="char" svg:width="6.9252in" svg:height="3.961in" draw:z-index="0"><draw:image xlink:href="Pictures/1000000100000A30000005D426B79E14.png" xlink:type="simple" xlink:show="embed" xlink:actuate="onLoad" draw:mime-type="image/png"/></draw:frame><text:soft-page-break/>Pass constants to Settings, Views, Templates</text:h>
      <text:p text:style-name="P57"/>
      <text:p text:style-name="P58">In mydj folder </text:p>
      <text:p text:style-name="P58"><text:tab/>create constants.py</text:p>
      <text:p text:style-name="P58"><text:tab/>Keep all the required values in this file eg (Project Constant Languages = PC_LANGUAGES)</text:p>
      <text:p text:style-name="P58"/>
      <text:p text:style-name="P58">For getting these values into VIEWS the route is</text:p>
      <text:p text:style-name="P58"><text:tab/>constants.py &gt; settings.py &gt; views</text:p>
      <text:p text:style-name="P58"><text:tab/>constants.py &gt; settings.py</text:p>
      <text:p text:style-name="P58"><text:tab/>In settings.py </text:p>
      <text:p text:style-name="P58"><text:tab/>at the top - </text:p>
      <text:p text:style-name="P58"><text:tab/><text:tab/>“from .constants import PC_NAVBAR_ITEMS, PC_THEMES, PC_LANGUAGES”</text:p>
      <text:p text:style-name="P58"><text:tab/>at the bottom - </text:p>
      <text:p text:style-name="P58"><text:tab/># importing the constants from constants.py</text:p>
      <text:p text:style-name="P58"><text:tab/><text:tab/>PC_NAVBAR_ITEMS = PC_NAVBAR_ITEMS </text:p>
      <text:p text:style-name="P58"><text:tab/><text:tab/>PC_THEMES = PC_THEMES </text:p>
      <text:p text:style-name="P58"><text:tab/><text:tab/>PC_LANGUAGES = PC_LANGUAGES<text:tab/></text:p>
      <text:p text:style-name="P58"><text:soft-page-break/><text:tab/>constants.py &gt; settings.py &gt; views</text:p>
      <text:p text:style-name="P58"><text:tab/><text:tab/>at the top: </text:p>
      <text:p text:style-name="P58"><text:tab/><text:tab/><text:tab/>from django.conf import settings<text:tab/></text:p>
      <text:p text:style-name="P58"><text:tab/><text:tab/>then we can use the values as “settings.PC_NAVBAR_ITEMS”</text:p>
      <text:p text:style-name="P58"/>
      <text:p text:style-name="P58">For getting these values into TEMPLATES the route is</text:p>
      <text:p text:style-name="P58"><text:tab/>constants.py &gt; settings.py &gt; context_processors.py &gt; settings.py TEMPLATE </text:p>
      <text:p text:style-name="P58"><text:tab/>Create a file called <text:s/>context_processors.py</text:p>
      <text:p text:style-name="P58"><text:tab/>def settings_constants(request): <text:s/>and PASS the required values from settings.py</text:p>
      <text:p text:style-name="P58"><text:tab/><text:span text:style-name="T16">In settings.py maje the following settings:</text:span></text:p>
      <text:p text:style-name="P58"/>
      <text:p text:style-name="P58"><text:tab/>TEMPLATES = [</text:p>
      <text:p text:style-name="P58"><text:s text:c="4"/><text:tab/><text:tab/>{</text:p>
      <text:p text:style-name="P58"><text:s text:c="8"/><text:tab/><text:tab/><text:tab/>...</text:p>
      <text:p text:style-name="P58"><text:tab/><text:tab/> <text:s text:c="7"/><text:tab/>'OPTIONS': {</text:p>
      <text:p text:style-name="P58"><text:s text:c="12"/><text:tab/><text:tab/><text:tab/>'context_processors': [</text:p>
      <text:p text:style-name="P59"><text:s text:c="16"/><text:tab/><text:tab/><text:tab/><text:tab/>…</text:p>
      <text:p text:style-name="P59"><text:tab/><text:tab/><text:tab/><text:tab/><text:tab/>'mydj.context_processors.settings_constants', # context_processors</text:p>
      <text:p text:style-name="P59"/>
      <text:p text:style-name="P59"><text:tab/><text:span text:style-name="T16">Now the value like LANGUAGE_CODE is available for Templates.</text:span></text:p>
      <text:h text:style-name="Heading_20_1" text:outline-level="1">Customize D<text:span text:style-name="T17">aisy </text:span>themes and bring the client specific values from db</text:h>
      <text:p text:style-name="P60">For using clienttheme as the source css instead of standard daisy, steps are:</text:p>
      <text:p text:style-name="P60">1. Model ThemePreset to have base values like light, dark (default values)</text:p>
      <text:p text:style-name="P60">2. ClientTheme to have Client specific values like light, dark which in turn is linked to ThemePreset light, dark etc; Client Specific values to override defaults</text:p>
      <text:p text:style-name="P60">3. resolve_theme(theme) code to do this step 2 above</text:p>
      <text:p text:style-name="P60">4. Inject the variables in base.html </text:p>
      <text:p text:style-name="P60">Example code</text:p>
      <text:p text:style-name="P60"><text:soft-page-break/>:root {</text:p>
      <text:p text:style-name="P60"><text:s text:c="2"/>--p: {{ theme.primary }};</text:p>
      <text:p text:style-name="P60"><text:s text:c="2"/>--s: {{ theme.secondary }};</text:p>
      <text:p text:style-name="P60"><text:s text:c="2"/>--a: {{ theme.accent }};</text:p>
      <text:p text:style-name="P60"><text:s text:c="2"/>--n: {{ theme.neutral }};</text:p>
      <text:p text:style-name="P60"><text:s text:c="2"/>--b1: {{ theme.base_100 }};</text:p>
      <text:p text:style-name="P60"><text:s text:c="2"/>--font-main: {{ theme.font_family }};</text:p>
      <text:p text:style-name="P60">5. configure daisyui to use these variables: </text:p>
      <text:p text:style-name="P60">A Constant value "clienttheme" is pushed into daisyui. This takes variable values like b1, b2 etc</text:p>
      <text:p text:style-name="P60">theme &gt; static_src &gt; src &gt; styles.css <text:s/>(tailwind.config.js file is not visible in django-tailwind setup) </text:p>
      <text:p text:style-name="P60">Example code</text:p>
      <text:p text:style-name="P60">@plugin "daisyui/theme" {</text:p>
      <text:p text:style-name="P60"><text:s text:c="2"/>name: "clienttheme";</text:p>
      <text:p text:style-name="P60"><text:s text:c="2"/>default: true; /* set as default */</text:p>
      <text:p text:style-name="P60"><text:s text:c="2"/>prefersdark: false; /* set as default dark mode (prefers-color-scheme:dark) */</text:p>
      <text:p text:style-name="P60"><text:s text:c="2"/>color-scheme: light; /* color of browser-provided UI */</text:p>
      <text:p text:style-name="P60"/>
      <text:p text:style-name="P60"><text:s text:c="2"/>--color-base-100: oklch(var(--b1));</text:p>
      <text:p text:style-name="P60"><text:s text:c="2"/>--color-base-2</text:p>
      <text:p text:style-name="P60">6. In Views - pass the variable values like b1, b2 etc based on the theme chosen into a dict called theme.</text:p>
      <text:p text:style-name="P60">This dict called theme is pulled into base.html and passed on to daisyui.</text:p>
      <text:h text:style-name="P61" text:outline-level="1">Models</text:h>
      <text:p text:style-name="P62">After creating models:</text:p>
      <text:p text:style-name="P62">sql migrate</text:p>
      <text:p text:style-name="P63">python manage.py makemigrations</text:p>
      <text:p text:style-name="P63">python manage.py migrate</text:p>
      <text:h text:style-name="P64" text:outline-level="2"/>
      <text:p text:style-name="P65">To completely refresh the models:</text:p>
      <text:p text:style-name="P65"><text:soft-page-break/>1. Delete dbsqlite</text:p>
      <text:p text:style-name="P65">2. Delete the migrations files</text:p>
      <text:p text:style-name="P65">3. Create the Models</text:p>
      <text:p text:style-name="P65">4. makemigrations</text:p>
      <text:p text:style-name="P65">5. migrate</text:p>
      <text:p text:style-name="P65">6. python manage.py createsuperuser</text:p>
      <text:p text:style-name="P65"/>
      <text:h text:style-name="P66" text:outline-level="1">Golden rule (save this)</text:h>
      <text:p text:style-name="P67"><text:span text:style-name="Strong_20_Emphasis">Databases are for filtering &amp; joining.<text:line-break/>Python is for shaping data.<text:line-break/>Templates are for rendering only.</text:span></text:p>
      <text:p text:style-name="P65"/>
      <text:p text:style-name="P65"/>
      <text:h text:style-name="P68" text:outline-level="2">Datastar</text:h>
      <text:p text:style-name="P60">In the requirements add </text:p>
      <text:p text:style-name="P60">datastar-py==0.8.0 # this is for datastar</text:p>
      <text:p text:style-name="P60"/>
      <text:p text:style-name="P60">Goal</text:p>
      <text:p text:style-name="P60"/>
      <text:p text:style-name="P60">Click theme →</text:p>
      <text:p text:style-name="P60">Datastar POST →</text:p>
      <text:p text:style-name="P60">Server returns only updated &lt;style&gt; block →</text:p>
      <text:p text:style-name="P60">Datastar swaps it →</text:p>
      <text:p text:style-name="P60">Theme updates live</text:p>
      <text:p text:style-name="P60"/>
      <text:p text:style-name="P60">No reload.</text:p>
      <text:p text:style-name="P60"/>
      <text:p text:style-name="P69">THIS IS NOT WORKING. DROPPED FOR THE TIME BEING.</text:p>
      <text:p text:style-name="P69"/>
      <text:p text:style-name="P70"><text:soft-page-break/></text:p>
      <text:h text:style-name="Heading_20_1" text:outline-level="1">GlobalVal</text:h>
      <text:p text:style-name="Text_20_body"/>
      <text:p text:style-name="Text_20_body">DB: GlobalValCat + GlobalVal (keyval_en, keyval_hi, keyval_fr, keyval_ta)</text:p>
      <text:p text:style-name="Text_20_body"><text:s text:c="8"/>↓ <text:s/>single query via .values()</text:p>
      <text:p text:style-name="Text_20_body">Cache: nested dict { cat: { key: { lang: val } } } <text:s text:c="2"/>TTL 1hr</text:p>
      <text:p text:style-name="Text_20_body"><text:s text:c="8"/>↓ <text:s/>auto-busted on post_save / post_delete</text:p>
      <text:p text:style-name="Text_20_body">Context processor: resolves to active language → gv + gvt</text:p>
      <text:p text:style-name="Text_20_body"><text:s text:c="8"/>↓</text:p>
      <text:p text:style-name="Text_20_body">Template: {{ gv.accounts.logout }} <text:s/>or <text:s/>{{ gvt.accounts.logout.hi }}</text:p>
      <text:p text:style-name="Text_20_body"/>
      <text:h text:style-name="Heading_20_2" text:outline-level="2">Models</text:h>
      <text:p text:style-name="Text_20_body">class GlobalValCat(models.Model):</text:p>
      <text:p text:style-name="Text_20_body"><text:s text:c="4"/>globalvalcat_id = LowercaseCharField(max_length=25, primary_key=True)</text:p>
      <text:p text:style-name="Text_20_body"/>
      <text:p text:style-name="Text_20_body"><text:s text:c="4"/>class Meta:</text:p>
      <text:p text:style-name="Text_20_body"><text:s text:c="8"/>verbose_name <text:s text:c="7"/>= "Global Value Category"</text:p>
      <text:p text:style-name="Text_20_body"><text:s text:c="8"/>verbose_name_plural = "Global Value Categories"</text:p>
      <text:p text:style-name="Text_20_body"><text:s text:c="8"/>ordering <text:s text:c="11"/>= ['globalvalcat_id']</text:p>
      <text:p text:style-name="Text_20_body"/>
      <text:p text:style-name="Text_20_body"><text:s text:c="4"/>def __str__(self):</text:p>
      <text:p text:style-name="Text_20_body"><text:s text:c="8"/>return self.globalvalcat_id</text:p>
      <text:p text:style-name="Text_20_body"/>
      <text:p text:style-name="Text_20_body"/>
      <text:p text:style-name="Text_20_body">class GlobalVal(models.Model):</text:p>
      <text:p text:style-name="Text_20_body"><text:s text:c="4"/>globalvalcat = models.ForeignKey(</text:p>
      <text:p text:style-name="Text_20_body"><text:s text:c="8"/>GlobalValCat,</text:p>
      <text:p text:style-name="Text_20_body"><text:s text:c="8"/>on_delete=models.CASCADE,</text:p>
      <text:p text:style-name="Text_20_body"><text:soft-page-break/><text:s text:c="8"/>related_name='globalvals'</text:p>
      <text:p text:style-name="Text_20_body"><text:s text:c="4"/>)</text:p>
      <text:p text:style-name="Text_20_body"><text:s text:c="4"/>key <text:s text:c="3"/>= models.CharField(max_length=100)</text:p>
      <text:p text:style-name="Text_20_body"><text:s text:c="4"/>keyval = models.CharField(max_length=500)</text:p>
      <text:p text:style-name="Text_20_body"/>
      <text:p text:style-name="Text_20_body"><text:s text:c="4"/>class Meta:</text:p>
      <text:p text:style-name="Text_20_body"><text:s text:c="8"/>unique_together = ('globalvalcat', 'key')</text:p>
      <text:p text:style-name="Text_20_body"><text:s text:c="8"/>ordering <text:s text:c="7"/>= ['globalvalcat__globalvalcat_id', 'key']</text:p>
      <text:p text:style-name="Text_20_body"/>
      <text:p text:style-name="Text_20_body"><text:s text:c="4"/>def __str__(self):</text:p>
      <text:p text:style-name="Text_20_body"><text:s text:c="8"/>return f"{self.globalvalcat_id}.{self.key}"</text:p>
      <text:p text:style-name="Text_20_body"/>
      <text:h text:style-name="Heading_20_2" text:outline-level="2">Translations.py</text:h>
      <text:p text:style-name="Text_20_body">from modeltranslation.translator import register, TranslationOptions</text:p>
      <text:p text:style-name="Text_20_body">from .models import GlobalVal</text:p>
      <text:p text:style-name="Text_20_body"/>
      <text:p text:style-name="Text_20_body">@register(GlobalVal)</text:p>
      <text:p text:style-name="Text_20_body">class GlobalValTranslationOptions(TranslationOptions):</text:p>
      <text:p text:style-name="Text_20_body"><text:s text:c="4"/>fields = ('keyval',)</text:p>
      <text:p text:style-name="Text_20_body"/>
      <text:h text:style-name="Heading_20_2" text:outline-level="2">Admin.py</text:h>
      <text:p text:style-name="Text_20_body">from django.contrib import admin</text:p>
      <text:p text:style-name="Text_20_body">from modeltranslation.admin import TranslationBaseModelAdmin</text:p>
      <text:p text:style-name="Text_20_body">import nested_admin</text:p>
      <text:p text:style-name="Text_20_body">from .models import GlobalValCat, GlobalVal</text:p>
      <text:p text:style-name="Text_20_body"/>
      <text:p text:style-name="Text_20_body"/>
      <text:p text:style-name="Text_20_body">class GlobalValInline(TranslationBaseModelAdmin, nested_admin.NestedTabularInline):</text:p>
      <text:p text:style-name="Text_20_body"><text:s text:c="4"/>model <text:s/>= GlobalVal</text:p>
      <text:p text:style-name="Text_20_body"><text:soft-page-break/><text:s text:c="4"/>extra <text:s/>= 1</text:p>
      <text:p text:style-name="Text_20_body"><text:s text:c="4"/>fields = ['key'] + [f'keyval_{code}' for code, _ in settings.LANGUAGES]</text:p>
      <text:p text:style-name="Text_20_body"><text:s text:c="4"/># Renders as:</text:p>
      <text:p text:style-name="Text_20_body"><text:s text:c="4"/># | key <text:s text:c="5"/>| keyval_en | keyval_hi | keyval_fr | keyval_ta |</text:p>
      <text:p text:style-name="Text_20_body"><text:s text:c="4"/># | logout <text:s text:c="2"/>| Logout <text:s text:c="3"/>| hiLogout <text:s/>| frLogout <text:s/>| <text:s text:c="10"/>|</text:p>
      <text:p text:style-name="Text_20_body"/>
      <text:p text:style-name="Text_20_body"/>
      <text:p text:style-name="Text_20_body">@admin.register(GlobalValCat)</text:p>
      <text:p text:style-name="Text_20_body">class GlobalValCatAdmin(nested_admin.NestedModelAdmin):</text:p>
      <text:p text:style-name="Text_20_body"><text:s text:c="4"/>inlines <text:s text:c="4"/>= [GlobalValInline]</text:p>
      <text:p text:style-name="Text_20_body"><text:s text:c="4"/>list_display = ('globalvalcat_id',)</text:p>
      <text:p text:style-name="Text_20_body"><text:s text:c="4"/>search_fields = ('globalvalcat_id',)</text:p>
      <text:p text:style-name="Text_20_body"/>
      <text:h text:style-name="Heading_20_2" text:outline-level="2">Directory structure</text:h>
      <text:p text:style-name="P71">myapp/</text:p>
      <text:p text:style-name="P71"><text:s text:c="4"/>utils/</text:p>
      <text:p text:style-name="P71"><text:s text:c="8"/>__init__.py</text:p>
      <text:p text:style-name="P71"><text:s text:c="8"/>common_functions.py <text:s text:c="3"/># existing</text:p>
      <text:p text:style-name="P71"><text:s text:c="8"/>globalval.py <text:s text:c="10"/># new — cache + transform logic</text:p>
      <text:p text:style-name="P71"><text:s text:c="4"/>signals.py <text:s text:c="16"/># at app level, alongside models.py</text:p>
      <text:p text:style-name="P71"><text:s text:c="4"/>apps.py</text:p>
      <text:p text:style-name="P71"><text:s text:c="4"/>models.py</text:p>
      <text:h text:style-name="Heading_20_2" text:outline-level="2">Utils.py</text:h>
      <text:p text:style-name="Text_20_body"># utils/globalval.py</text:p>
      <text:p text:style-name="Text_20_body">from django.core.cache import cache</text:p>
      <text:p text:style-name="Text_20_body">from django.conf import settings</text:p>
      <text:p text:style-name="Text_20_body"/>
      <text:p text:style-name="Text_20_body">CACHE_KEY = 'globalval_nested'</text:p>
      <text:p text:style-name="Text_20_body">CACHE_TTL = 3600 <text:s/># match your fetch_clientstatic timeout</text:p>
      <text:p text:style-name="Text_20_body"><text:soft-page-break/></text:p>
      <text:p text:style-name="Text_20_body"/>
      <text:p text:style-name="Text_20_body">def get_globalval():</text:p>
      <text:p text:style-name="Text_20_body"><text:s text:c="4"/>data = cache.get(CACHE_KEY)</text:p>
      <text:p text:style-name="Text_20_body"><text:s text:c="4"/>if data is not None:</text:p>
      <text:p text:style-name="Text_20_body"><text:s text:c="8"/>return data</text:p>
      <text:p text:style-name="Text_20_body"/>
      <text:p text:style-name="Text_20_body"><text:s text:c="4"/>lang_codes = [code for code, _ in settings.LANGUAGES]</text:p>
      <text:p text:style-name="Text_20_body"><text:s text:c="4"/>qs = GlobalVal.objects.select_related('globalvalcat').values(</text:p>
      <text:p text:style-name="Text_20_body"><text:s text:c="8"/>'globalvalcat__globalvalcat_id',</text:p>
      <text:p text:style-name="Text_20_body"><text:s text:c="8"/>'key',</text:p>
      <text:p text:style-name="Text_20_body"><text:s text:c="8"/>*[f'keyval_{code}' for code in lang_codes]</text:p>
      <text:p text:style-name="Text_20_body"><text:s text:c="4"/>)</text:p>
      <text:p text:style-name="Text_20_body"/>
      <text:p text:style-name="Text_20_body"><text:s text:c="4"/>data = {}</text:p>
      <text:p text:style-name="Text_20_body"><text:s text:c="4"/>for row in qs:</text:p>
      <text:p text:style-name="Text_20_body"><text:s text:c="8"/>cat = row['globalvalcat__globalvalcat_id']</text:p>
      <text:p text:style-name="Text_20_body"><text:s text:c="8"/>key = row['key']</text:p>
      <text:p text:style-name="Text_20_body"><text:s text:c="8"/>data.setdefault(cat, {})[key] = {</text:p>
      <text:p text:style-name="Text_20_body"><text:s text:c="12"/>code: row[f'keyval_{code}'] or ''</text:p>
      <text:p text:style-name="Text_20_body"><text:s text:c="12"/>for code in lang_codes</text:p>
      <text:p text:style-name="Text_20_body"><text:s text:c="8"/>}</text:p>
      <text:p text:style-name="Text_20_body"/>
      <text:p text:style-name="Text_20_body"><text:s text:c="4"/>cache.set(CACHE_KEY, data, CACHE_TTL)</text:p>
      <text:p text:style-name="Text_20_body"><text:s text:c="4"/>return data</text:p>
      <text:p text:style-name="Text_20_body"/>
      <text:p text:style-name="Text_20_body"/>
      <text:p text:style-name="Text_20_body">def get_val(category, key, lang=None, fallback='en'):</text:p>
      <text:p text:style-name="Text_20_body"><text:s text:c="4"/>lang = lang or settings.LANGUAGE_CODE</text:p>
      <text:p text:style-name="Text_20_body"><text:s text:c="4"/>data = get_globalval()</text:p>
      <text:p text:style-name="Text_20_body"><text:soft-page-break/><text:s text:c="4"/>translations = data.get(category, {}).get(key, {})</text:p>
      <text:p text:style-name="Text_20_body"><text:s text:c="4"/>return (</text:p>
      <text:p text:style-name="Text_20_body"><text:s text:c="8"/>translations.get(lang)</text:p>
      <text:p text:style-name="Text_20_body"><text:s text:c="8"/>or translations.get(fallback)</text:p>
      <text:p text:style-name="Text_20_body"><text:s text:c="8"/>or f"{category}.{key}"</text:p>
      <text:p text:style-name="Text_20_body"><text:s text:c="4"/>)</text:p>
      <text:p text:style-name="Text_20_body"/>
      <text:p text:style-name="Text_20_body"/>
      <text:p text:style-name="Text_20_body">def bust_globalval_cache():</text:p>
      <text:p text:style-name="Text_20_body"><text:s text:c="4"/>cache.delete(CACHE_KEY)</text:p>
      <text:p text:style-name="Text_20_body"/>
      <text:p text:style-name="P72"/>
      <text:p text:style-name="P72"/>
      <text:p text:style-name="P72"><draw:frame draw:style-name="fr2" draw:name="Frame1" text:anchor-type="as-char" draw:z-index="1"><draw:text-box fo:min-height="0.0161in" fo:min-width="0.0161in"><text:h text:style-name="P73" text:outline-level="2">Signals.py</text:h></draw:text-box></draw:frame></text:p>
      <text:p text:style-name="P72"># signals.py</text:p>
      <text:p text:style-name="P72">from django.db.models.signals import post_save, post_delete</text:p>
      <text:p text:style-name="P72">from django.dispatch import receiver</text:p>
      <text:p text:style-name="P72">from .models import GlobalVal</text:p>
      <text:p text:style-name="P72">from .utils.globalval import bust_globalval_cache</text:p>
      <text:p text:style-name="P72"/>
      <text:p text:style-name="P72">@receiver(post_save, sender=GlobalVal)</text:p>
      <text:p text:style-name="P72">@receiver(post_delete, sender=GlobalVal)</text:p>
      <text:p text:style-name="P72">def clear_globalval_cache(sender, **kwargs):</text:p>
      <text:p text:style-name="P72"><text:s text:c="4"/>bust_globalval_cache()</text:p>
      <text:h text:style-name="Heading_20_2" text:outline-level="2">Edit apps.py</text:h>
      <text:p text:style-name="P71">from django.apps import AppConfig</text:p>
      <text:p text:style-name="P71"/>
      <text:p text:style-name="P71"/>
      <text:p text:style-name="P71">class MysiteConfig(AppConfig):</text:p>
      <text:p text:style-name="P71"><text:soft-page-break/><text:s text:c="4"/>default_auto_field = 'django.db.models.BigAutoField'</text:p>
      <text:p text:style-name="P71"><text:s text:c="4"/>name = 'mysite'</text:p>
      <text:p text:style-name="P71"><text:s text:c="4"/>def ready(self):</text:p>
      <text:p text:style-name="P71"><text:s text:c="8"/>import mysite.signals <text:s text:c="2"/># ensures signals are connected on startup</text:p>
      <text:p text:style-name="P71"/>
      <text:p text:style-name="P72"><draw:frame draw:style-name="fr2" draw:name="Frame2" text:anchor-type="as-char" draw:z-index="2"><draw:text-box fo:min-height="0.0161in" fo:min-width="0.0161in"><text:h text:style-name="P73" text:outline-level="2">Context processors.py</text:h></draw:text-box></draw:frame></text:p>
      <text:p text:style-name="P72">from utils.globalval import get_globalval</text:p>
      <text:p text:style-name="P72">from django.conf import settings</text:p>
      <text:p text:style-name="P72"/>
      <text:p text:style-name="P72">def globalval(request):</text:p>
      <text:p text:style-name="P72"><text:s text:c="4"/>lang = request.session.get('lang', settings.LANGUAGE_CODE)</text:p>
      <text:p text:style-name="P72"><text:s text:c="4"/>raw <text:s/>= get_globalval()</text:p>
      <text:p text:style-name="P72"/>
      <text:p text:style-name="P72"><text:s text:c="4"/># Resolve entire nested dict to active language</text:p>
      <text:p text:style-name="P72"><text:s text:c="4"/>resolved = {</text:p>
      <text:p text:style-name="P72"><text:s text:c="8"/>cat: {</text:p>
      <text:p text:style-name="P72"><text:s text:c="12"/>key: (translations.get(lang) or translations.get('en') or key)</text:p>
      <text:p text:style-name="P72"><text:s text:c="12"/>for key, translations in keys.items()</text:p>
      <text:p text:style-name="P72"><text:s text:c="8"/>}</text:p>
      <text:p text:style-name="P72"><text:s text:c="8"/>for cat, keys in raw.items()</text:p>
      <text:p text:style-name="P72"><text:s text:c="4"/>}</text:p>
      <text:p text:style-name="P72"/>
      <text:p text:style-name="P72"><text:s text:c="4"/>return {</text:p>
      <text:p text:style-name="P72"><text:s text:c="8"/>'gv': <text:s/>resolved, <text:s/># {{ gv.accounts.logout }} → "Logout"</text:p>
      <text:p text:style-name="P72"><text:s text:c="8"/>'gvt': raw, <text:s text:c="6"/># {{ gvt.accounts.logout.hi }} → "hiLogout"</text:p>
      <text:p text:style-name="P72"><text:s text:c="4"/>}</text:p>
      <text:h text:style-name="Heading_20_2" text:outline-level="2">Settings.py</text:h>
      <text:p text:style-name="P74">Add the below line:</text:p>
      <text:p text:style-name="P74">'mydj.context_processors.globalval', <text:s text:c="5"/># context_processors for globalval</text:p>
      <text:p text:style-name="P74"><text:soft-page-break/></text:p>
      <text:p text:style-name="P72"><draw:frame draw:style-name="fr2" draw:name="Frame3" text:anchor-type="as-char" draw:z-index="3"><draw:text-box fo:min-height="0.0161in" fo:min-width="0.0161in"><text:h text:style-name="P73" text:outline-level="2">Template usage</text:h></draw:text-box></draw:frame><text:line-break/>{# Active language #}</text:p>
      <text:p text:style-name="P72">{{ gv.accounts.logout }}</text:p>
      <text:p text:style-name="P72">{{ gv.accounts.signin_up }}</text:p>
      <text:p text:style-name="P72"/>
      <text:p text:style-name="P72">{# Specific language #}</text:p>
      <text:p text:style-name="P72">{{ gvt.accounts.logout.hi }}</text:p>
      <text:p text:style-name="P72"/>
      <text:p text:style-name="P72">{# In your auth component #}</text:p>
      <text:p text:style-name="P72">&lt;c-auth-menu /&gt;</text:p>
      <text:p text:style-name="P72"/>
      <text:p text:style-name="P72">{# Inside auth_menu.html #}</text:p>
      <text:p text:style-name="P72">{{ gv.accounts.signin }} <text:s text:c="3"/>{# → "SignIn" <text:s text:c="5"/>#}</text:p>
      <text:p text:style-name="P72">{{ gv.accounts.signup }} <text:s text:c="3"/>{# → "SignUp" <text:s text:c="5"/>#}</text:p>
      <text:p text:style-name="P72">{{ gv.accounts.logout }} <text:s text:c="3"/>{# → "Logout" <text:s text:c="5"/>#}</text:p>
      <text:p text:style-name="P72"/>
      <text:h text:style-name="Heading_20_1" text:outline-level="1">Client level Auth using guardian</text:h>
      <text:p text:style-name="Text_20_body">Client</text:p>
      <text:p text:style-name="Text_20_body"><text:s text:c="2"/>└── ClientGroup <text:s/>(e.g. "Warehouse Staff", "Billing Team", "Store A Managers")</text:p>
      <text:p text:style-name="Text_20_body"><text:s text:c="8"/>├── module permissions <text:s/>(what they can do)</text:p>
      <text:p text:style-name="Text_20_body"><text:s text:c="8"/>├── location scope <text:s text:c="5"/>(which stores/branches)</text:p>
      <text:p text:style-name="Text_20_body"><text:s text:c="8"/>└── Users <text:s text:c="14"/>(many users assigned to one group)</text:p>
      <text:p text:style-name="Text_20_body"/>
      <text:p text:style-name="Text_20_body">Superadmin</text:p>
      <text:p text:style-name="Text_20_body"><text:s text:c="2"/>→ Sees all 100+ clients in admin list</text:p>
      <text:p text:style-name="Text_20_body"><text:s text:c="2"/>→ Full CRUD on everything</text:p>
      <text:p text:style-name="Text_20_body"/>
      <text:p text:style-name="Text_20_body">Client Admin (e.g. user for "acme" client)</text:p>
      <text:p text:style-name="Text_20_body"><text:soft-page-break/><text:s text:c="2"/>→ Admin list shows ONLY "acme"</text:p>
      <text:p text:style-name="Text_20_body"><text:s text:c="2"/>→ Sees Pages, Themes, and ClientUserRole inline</text:p>
      <text:p text:style-name="Text_20_body"><text:s text:c="2"/>→ Can add/change/delete everything under acme</text:p>
      <text:p text:style-name="Text_20_body"><text:s text:c="2"/>→ Can manage editor/viewer users for acme</text:p>
      <text:p text:style-name="Text_20_body"/>
      <text:p text:style-name="Text_20_body">Client Editor (e.g. user for "acme" client)</text:p>
      <text:p text:style-name="Text_20_body"><text:s text:c="2"/>→ Admin list shows ONLY "acme"</text:p>
      <text:p text:style-name="Text_20_body"><text:s text:c="2"/>→ Sees Pages and Themes inline</text:p>
      <text:p text:style-name="Text_20_body"><text:s text:c="2"/>→ Can add and edit, cannot delete</text:p>
      <text:p text:style-name="Text_20_body"><text:s text:c="2"/>→ Cannot see ClientUserRole inline</text:p>
      <text:p text:style-name="Text_20_body"/>
      <text:p text:style-name="Text_20_body">Client Viewer (e.g. user for "acme" client)</text:p>
      <text:p text:style-name="Text_20_body"><text:s text:c="2"/>→ Admin list shows ONLY "acme"</text:p>
      <text:p text:style-name="Text_20_body"><text:s text:c="2"/>→ Read-only access to Pages and Themes</text:p>
      <text:p text:style-name="Text_20_body"><text:s text:c="2"/>→ No add/edit/delete buttons shown</text:p>
      <text:p text:style-name="Text_20_body"/>
      <text:p text:style-name="P75">Summary of permission flow</text:p>
      <text:p text:style-name="P75">Superadmin creates ClientUserRole(user=X, client=acme, role='admin')</text:p>
      <text:p text:style-name="P75"><text:s text:c="8"/>↓ post_save signal</text:p>
      <text:p text:style-name="P75">user X gets is_staff=True</text:p>
      <text:p text:style-name="P75">guardian assigns view + edit + create + admin perms on Client(acme)</text:p>
      <text:p text:style-name="P75"><text:s text:c="8"/>↓</text:p>
      <text:p text:style-name="P75">User X logs into /admin/</text:p>
      <text:p text:style-name="P75">get_queryset() calls get_objects_for_user() → returns only Client(acme)</text:p>
      <text:p text:style-name="P75"><text:s text:c="8"/>↓</text:p>
      <text:p text:style-name="P75">All inlines scoped to acme automatically via ClientScopedMixin</text:p>
      <text:p text:style-name="P75"><text:s text:c="8"/>↓</text:p>
      <text:p text:style-name="P75">Client admin X can now add ClientUserRole for their own editors/viewers</text:p>
      <text:p text:style-name="P75"/>
      <text:h text:style-name="Heading_20_2" text:outline-level="2"><text:soft-page-break/>Process flow</text:h>
      <text:p text:style-name="Text_20_body">Superuser logs into /admin/</text:p>
      <text:p text:style-name="Text_20_body"><text:s text:c="2"/>→ Creates a User account (e.g. john@acme.com)</text:p>
      <text:p text:style-name="Text_20_body"><text:s text:c="2"/>→ Creates a ClientGroup:</text:p>
      <text:p text:style-name="Text_20_body"><text:s text:c="6"/>client <text:s text:c="3"/>= acme</text:p>
      <text:p text:style-name="Text_20_body"><text:s text:c="6"/>group_id <text:s/>= acme_admins</text:p>
      <text:p text:style-name="Text_20_body"><text:s text:c="6"/>name <text:s text:c="5"/>= 'Acme Administrators'</text:p>
      <text:p text:style-name="Text_20_body"><text:s text:c="6"/>role <text:s text:c="5"/>= 'admin'</text:p>
      <text:p text:style-name="Text_20_body"><text:s text:c="6"/>locations = (empty = all locations)</text:p>
      <text:p text:style-name="Text_20_body"><text:s text:c="2"/>→ Creates a ClientUserMembership:</text:p>
      <text:p text:style-name="Text_20_body"><text:s text:c="6"/>user <text:s/>= john@acme.com</text:p>
      <text:p text:style-name="Text_20_body"><text:s text:c="6"/>group = acme_admins</text:p>
      <text:p text:style-name="Text_20_body">Signal fires →</text:p>
      <text:p text:style-name="Text_20_body"><text:s text:c="2"/>1. Sets john.is_staff = True <text:s text:c="6"/>(so John can log into /admin/)</text:p>
      <text:p text:style-name="Text_20_body"><text:s text:c="2"/>2. Assigns guardian object perms on Client(acme):</text:p>
      <text:p text:style-name="Text_20_body"><text:s text:c="7"/>view_client_data <text:s text:c="2"/>✓</text:p>
      <text:p text:style-name="Text_20_body"><text:s text:c="7"/>edit_client_data <text:s text:c="2"/>✓</text:p>
      <text:p text:style-name="Text_20_body"><text:s text:c="7"/>create_client_data ✓</text:p>
      <text:p text:style-name="Text_20_body"><text:s text:c="7"/>admin_client_data <text:s/>✓ <text:s text:c="10"/>(admin role gets all four)</text:p>
      <text:p text:style-name="Text_20_body">John goes to /admin/</text:p>
      <text:p text:style-name="Text_20_body">Django checks: is_staff=True → allowed in</text:p>
      <text:p text:style-name="Text_20_body">Django admin list page loads:</text:p>
      <text:p text:style-name="Text_20_body"/>
      <text:p text:style-name="Text_20_body">ClientAdmin.get_queryset() runs →</text:p>
      <text:p text:style-name="Text_20_body"><text:s text:c="2"/>get_objects_for_user(john, 'view_client_data') →</text:p>
      <text:p text:style-name="Text_20_body"><text:s text:c="2"/>guardian returns only Client(acme) →</text:p>
      <text:p text:style-name="Text_20_body"><text:s text:c="2"/>John sees ONLY acme in the list</text:p>
      <text:p text:style-name="Text_20_body"/>
      <text:p text:style-name="Text_20_body">John clicks acme →</text:p>
      <text:p text:style-name="Text_20_body"><text:s text:c="2"/>has_view_permission() → guardian check → True</text:p>
      <text:p text:style-name="Text_20_body"><text:soft-page-break/><text:s text:c="2"/>has_change_permission() → guardian check → True</text:p>
      <text:p text:style-name="Text_20_body"><text:s text:c="2"/>Form loads with all inlines: Pages, Themes, ClientGroups</text:p>
      <text:p text:style-name="Text_20_body">John is in acme's admin page →</text:p>
      <text:p text:style-name="Text_20_body"><text:s text:c="2"/>Sees ClientGroup inline</text:p>
      <text:p text:style-name="Text_20_body"><text:s text:c="2"/>Creates a new group:</text:p>
      <text:p text:style-name="Text_20_body"><text:s text:c="6"/>group_id <text:s/>= warehouse_staff</text:p>
      <text:p text:style-name="Text_20_body"><text:s text:c="6"/>name <text:s text:c="5"/>= 'Warehouse Staff'</text:p>
      <text:p text:style-name="Text_20_body"><text:s text:c="6"/>role <text:s text:c="5"/>= 'staff'</text:p>
      <text:p text:style-name="Text_20_body"><text:s text:c="6"/>locations = [store_a, store_b] <text:s text:c="2"/>← location scoped</text:p>
      <text:p text:style-name="Text_20_body"/>
      <text:p text:style-name="Text_20_body"><text:s text:c="2"/>Adds ClientGroupPermission rows to that group:</text:p>
      <text:p text:style-name="Text_20_body"><text:s text:c="6"/>module='order', <text:s text:c="3"/>action='view'</text:p>
      <text:p text:style-name="Text_20_body"><text:s text:c="6"/>module='order', <text:s text:c="3"/>action='edit'</text:p>
      <text:p text:style-name="Text_20_body"><text:s text:c="6"/>module='delivery', action='view'</text:p>
      <text:p text:style-name="Text_20_body"><text:s text:c="6"/>module='delivery', action='edit'</text:p>
      <text:p text:style-name="Text_20_body"/>
      <text:p text:style-name="Text_20_body"><text:s text:c="2"/>Creates another group:</text:p>
      <text:p text:style-name="Text_20_body"><text:s text:c="6"/>group_id <text:s/>= billing_team</text:p>
      <text:p text:style-name="Text_20_body"><text:s text:c="6"/>name <text:s text:c="5"/>= 'Billing Team'</text:p>
      <text:p text:style-name="Text_20_body"><text:s text:c="6"/>role <text:s text:c="5"/>= 'staff'</text:p>
      <text:p text:style-name="Text_20_body"><text:s text:c="6"/>locations = (empty = all locations)</text:p>
      <text:p text:style-name="Text_20_body"/>
      <text:p text:style-name="Text_20_body"><text:s text:c="2"/>Adds permissions:</text:p>
      <text:p text:style-name="Text_20_body"><text:s text:c="6"/>module='billing', <text:s text:c="2"/>action='view'</text:p>
      <text:p text:style-name="Text_20_body"><text:s text:c="6"/>module='billing', <text:s text:c="2"/>action='edit'</text:p>
      <text:p text:style-name="Text_20_body"><text:s text:c="6"/>module='quotation', action='view'</text:p>
      <text:p text:style-name="Text_20_body">Creates User: warehouse1@acme.com</text:p>
      <text:p text:style-name="Text_20_body"><text:s text:c="2"/>Creates ClientUserMembership:</text:p>
      <text:p text:style-name="Text_20_body"><text:s text:c="6"/>user <text:s/>= warehouse1@acme.com</text:p>
      <text:p text:style-name="Text_20_body"><text:s text:c="6"/>group = warehouse_staff</text:p>
      <text:p text:style-name="Text_20_body"><text:soft-page-break/></text:p>
      <text:p text:style-name="Text_20_body"><text:s text:c="2"/>Signal fires →</text:p>
      <text:p text:style-name="Text_20_body"><text:s text:c="4"/>warehouse1.is_staff = True</text:p>
      <text:p text:style-name="Text_20_body"><text:s text:c="4"/>guardian assigns on Client(acme):</text:p>
      <text:p text:style-name="Text_20_body"><text:s text:c="6"/>view_client_data <text:s text:c="2"/>✓ <text:s text:c="2"/>(staff role)</text:p>
      <text:p text:style-name="Text_20_body"><text:s text:c="6"/>edit_client_data <text:s text:c="2"/>✓</text:p>
      <text:p text:style-name="Text_20_body"><text:s text:c="6"/>create_client_data ✓</text:p>
      <text:p text:style-name="Text_20_body"><text:s text:c="6"/>admin_client_data <text:s/>✗ <text:s text:c="2"/>(not admin role)</text:p>
      <text:p text:style-name="Text_20_body">warehouse1@acme.com goes to /admin/</text:p>
      <text:p text:style-name="Text_20_body"/>
      <text:p text:style-name="Text_20_body">Step 1 — Which clients can I see?</text:p>
      <text:p text:style-name="Text_20_body"><text:s text:c="2"/>get_queryset() → get_objects_for_user(warehouse1, 'view_client_data')</text:p>
      <text:p text:style-name="Text_20_body"><text:s text:c="2"/>guardian returns Client(acme) only → sees only acme ✓</text:p>
      <text:p text:style-name="Text_20_body"/>
      <text:p text:style-name="Text_20_body">Step 2 — Which inlines appear on acme's page?</text:p>
      <text:p text:style-name="Text_20_body"><text:s text:c="2"/>get_inlines() checks:</text:p>
      <text:p text:style-name="Text_20_body"><text:s text:c="4"/>has admin_client_data perm? → No</text:p>
      <text:p text:style-name="Text_20_body"><text:s text:c="4"/>→ ClientGroup inline hidden <text:s/>✓ (can't manage users)</text:p>
      <text:p text:style-name="Text_20_body"><text:s text:c="4"/></text:p>
      <text:p text:style-name="Text_20_body"><text:s text:c="4"/>has module perm for cms? → No</text:p>
      <text:p text:style-name="Text_20_body"><text:s text:c="4"/>→ Page inline hidden <text:s text:c="5"/>✓ (can't edit pages/layouts)</text:p>
      <text:p text:style-name="Text_20_body"><text:s text:c="4"/></text:p>
      <text:p text:style-name="Text_20_body"><text:s text:c="4"/>has module perm for order? → Yes (view + edit)</text:p>
      <text:p text:style-name="Text_20_body"><text:s text:c="4"/>→ Order inline shown <text:s text:c="5"/>✓</text:p>
      <text:p text:style-name="Text_20_body"/>
      <text:p text:style-name="Text_20_body">Step 3 — What can they do with Orders?</text:p>
      <text:p text:style-name="Text_20_body"><text:s text:c="2"/>has_view_permission() <text:s text:c="2"/>→ has_module_perm(user, acme, 'order', 'view') <text:s text:c="2"/>→ True</text:p>
      <text:p text:style-name="Text_20_body"><text:s text:c="2"/>has_change_permission() → has_module_perm(user, acme, 'order', 'edit') <text:s text:c="2"/>→ True</text:p>
      <text:p text:style-name="Text_20_body"><text:s text:c="2"/>has_add_permission() <text:s text:c="3"/>→ has_module_perm(user, acme, 'order', 'create') → False</text:p>
      <text:p text:style-name="Text_20_body"><text:s text:c="2"/>has_delete_permission() → has_module_perm(user, acme, 'order', 'delete') → False</text:p>
      <text:p text:style-name="Text_20_body"><text:soft-page-break/></text:p>
      <text:p text:style-name="Text_20_body">Step 4 — Which locations can they see?</text:p>
      <text:p text:style-name="Text_20_body"><text:s text:c="2"/>get_queryset() on OrderAdmin:</text:p>
      <text:p text:style-name="Text_20_body"><text:s text:c="4"/>get_user_permissions(warehouse1, acme) →</text:p>
      <text:p text:style-name="Text_20_body"><text:s text:c="6"/>all_locations = False</text:p>
      <text:p text:style-name="Text_20_body"><text:s text:c="6"/>locations = ['store_a', 'store_b']</text:p>
      <text:p text:style-name="Text_20_body"><text:s text:c="4"/>qs.filter(location__in=['store_a', 'store_b'])</text:p>
      <text:p text:style-name="Text_20_body"><text:s text:c="4"/>→ only sees orders from store_a and store_b ✓</text:p>
      <text:p text:style-name="Text_20_body">billing1@acme.com goes to /admin/</text:p>
      <text:p text:style-name="Text_20_body"/>
      <text:p text:style-name="Text_20_body">Same client scoping → sees only acme</text:p>
      <text:p text:style-name="Text_20_body"/>
      <text:p text:style-name="Text_20_body">Inlines shown:</text:p>
      <text:p text:style-name="Text_20_body"><text:s text:c="2"/>Order inline <text:s/>→ hidden (no order module perm)</text:p>
      <text:p text:style-name="Text_20_body"><text:s text:c="2"/>Billing inline → shown (has billing view + edit)</text:p>
      <text:p text:style-name="Text_20_body"><text:s text:c="2"/>Quotation inline → shown (has quotation view)</text:p>
      <text:p text:style-name="Text_20_body"/>
      <text:p text:style-name="Text_20_body">Location scope:</text:p>
      <text:p text:style-name="Text_20_body"><text:s text:c="2"/>billing group has no locations set → all_locations = True</text:p>
      <text:p text:style-name="Text_20_body"><text:s text:c="2"/>→ sees billing records from ALL locations ✓</text:p>
      <text:p text:style-name="Text_20_body"/>
      <text:p text:style-name="Text_20_body">What they can do:</text:p>
      <text:p text:style-name="Text_20_body"><text:s text:c="2"/>Billing: <text:s text:c="2"/>view ✓ <text:s/>edit ✓ <text:s/>create ✗ <text:s/>delete ✗</text:p>
      <text:p text:style-name="Text_20_body"><text:s text:c="2"/>Quotation: view ✓ <text:s/>edit ✗ <text:s/>create ✗ <text:s/>delete ✗</text:p>
      <text:p text:style-name="Text_20_body">LEVEL 1: Django admin access gate</text:p>
      <text:p text:style-name="Text_20_body"><text:s text:c="2"/>is_staff=True → set automatically by signal when user joins any ClientGroup</text:p>
      <text:p text:style-name="Text_20_body"><text:s text:c="2"/>is_staff=False → removed automatically when user leaves all groups</text:p>
      <text:p text:style-name="Text_20_body"/>
      <text:p text:style-name="Text_20_body">LEVEL 2: Which clients are visible</text:p>
      <text:p text:style-name="Text_20_body"><text:s text:c="2"/>guardian object permissions on Client model</text:p>
      <text:p text:style-name="Text_20_body"><text:soft-page-break/><text:s text:c="2"/>get_objects_for_user() → filters the admin list</text:p>
      <text:p text:style-name="Text_20_body"><text:s text:c="2"/>Controlled by: group role (admin/staff/viewer)</text:p>
      <text:p text:style-name="Text_20_body"/>
      <text:p text:style-name="Text_20_body">LEVEL 3: Which inlines appear</text:p>
      <text:p text:style-name="Text_20_body"><text:s text:c="2"/>get_inlines() checks module permissions + role</text:p>
      <text:p text:style-name="Text_20_body"><text:s text:c="2"/>CMS inlines (Page, Theme) → shown to admin role only</text:p>
      <text:p text:style-name="Text_20_body"><text:s text:c="2"/>Commerce inlines (Order, Billing) → shown per module permission</text:p>
      <text:p text:style-name="Text_20_body"><text:s text:c="2"/>User management inline → shown to admin role only</text:p>
      <text:p text:style-name="Text_20_body"/>
      <text:p text:style-name="Text_20_body">LEVEL 4: What actions are allowed</text:p>
      <text:p text:style-name="Text_20_body"><text:s text:c="2"/>has_view/change/add/delete_permission() hooks</text:p>
      <text:p text:style-name="Text_20_body"><text:s text:c="2"/>CMS models → checked via guardian (edit_client_data perm)</text:p>
      <text:p text:style-name="Text_20_body"><text:s text:c="2"/>Commerce models → checked via ClientGroupPermission (module + action)</text:p>
      <text:p text:style-name="Text_20_body"/>
      <text:p text:style-name="Text_20_body">LEVEL 5: Which records are visible within a module</text:p>
      <text:p text:style-name="Text_20_body"><text:s text:c="2"/>get_queryset() filters by location</text:p>
      <text:p text:style-name="Text_20_body"><text:s text:c="2"/>No location set on group → all records</text:p>
      <text:p text:style-name="Text_20_body"><text:s text:c="2"/>Locations set → only records for those locations</text:p>
      <text:p text:style-name="Text_20_body"/>
      <text:p text:style-name="Text_20_body"># LEVEL 2 — in every ModelAdmin</text:p>
      <text:p text:style-name="Text_20_body">def get_queryset(self, request):</text:p>
      <text:p text:style-name="Text_20_body"><text:s text:c="4"/>return qs.filter(client_id__in=self._permitted_client_ids(request))</text:p>
      <text:p text:style-name="Text_20_body"><text:s text:c="4"/># _permitted_client_ids uses guardian → get_objects_for_user()</text:p>
      <text:p text:style-name="Text_20_body"/>
      <text:p text:style-name="Text_20_body"># LEVEL 3 — in ClientAdmin</text:p>
      <text:p text:style-name="Text_20_body">def get_inlines(self, request, obj=None):</text:p>
      <text:p text:style-name="Text_20_body"><text:s text:c="4"/># checks role and module permissions to decide which inlines to show</text:p>
      <text:p text:style-name="Text_20_body"/>
      <text:p text:style-name="Text_20_body"># LEVEL 4 — in ClientScopedMixin</text:p>
      <text:p text:style-name="Text_20_body">def has_change_permission(self, request, obj=None):</text:p>
      <text:p text:style-name="Text_20_body"><text:soft-page-break/><text:s text:c="4"/># CMS: guardian perm on client object</text:p>
      <text:p text:style-name="Text_20_body"><text:s text:c="4"/># Commerce: ClientGroupPermission module+action check</text:p>
      <text:p text:style-name="Text_20_body"/>
      <text:p text:style-name="Text_20_body"># LEVEL 5 — in commerce ModelAdmins</text:p>
      <text:p text:style-name="Text_20_body">def get_queryset(self, request):</text:p>
      <text:p text:style-name="Text_20_body"><text:s text:c="4"/>perms = get_user_permissions(user, client)</text:p>
      <text:p text:style-name="Text_20_body"><text:s text:c="4"/>if not perms['all_locations']:</text:p>
      <text:p text:style-name="Text_20_body"><text:s text:c="8"/>qs = qs.filter(location__location_id__in=perms['locations'])</text:p>
      <text:p text:style-name="Text_20_body"/>
      <text:h text:style-name="Heading_20_2" text:outline-level="2">Install and configure</text:h>
      <text:p text:style-name="Text_20_body"># settings.py</text:p>
      <text:p text:style-name="Text_20_body">INSTALLED_APPS = [</text:p>
      <text:p text:style-name="Text_20_body"><text:s text:c="4"/>...</text:p>
      <text:p text:style-name="Text_20_body"><text:s text:c="4"/>'guardian',</text:p>
      <text:p text:style-name="Text_20_body">]</text:p>
      <text:p text:style-name="Text_20_body"/>
      <text:p text:style-name="Text_20_body">AUTHENTICATION_BACKENDS = [</text:p>
      <text:p text:style-name="Text_20_body"><text:s text:c="4"/>'django.contrib.auth.backends.ModelBackend',</text:p>
      <text:p text:style-name="Text_20_body"><text:s text:c="4"/>'guardian.backends.ObjectPermissionBackend',</text:p>
      <text:p text:style-name="Text_20_body">]</text:p>
      <text:p text:style-name="Text_20_body"/>
      <text:p text:style-name="Text_20_body">ANONYMOUS_USER_NAME = None</text:p>
      <text:p text:style-name="Text_20_body"/>
      <text:p text:style-name="Text_20_body">python manage.py migrate</text:p>
      <text:p text:style-name="Text_20_body"/>
      <text:h text:style-name="Heading_20_2" text:outline-level="2">Models</text:h>
      <text:p text:style-name="Text_20_body"># models.py</text:p>
      <text:p text:style-name="Text_20_body">from django.contrib.auth.models import User</text:p>
      <text:p text:style-name="Text_20_body">from django.db import models</text:p>
      <text:p text:style-name="Text_20_body"><text:soft-page-break/></text:p>
      <text:p text:style-name="Text_20_body"/>
      <text:p text:style-name="Text_20_body"># ── Location (Store / Branch) ─────────────────────────────────────────</text:p>
      <text:p text:style-name="Text_20_body"/>
      <text:p text:style-name="Text_20_body">class ClientLocation(models.Model):</text:p>
      <text:p text:style-name="Text_20_body"><text:s text:c="4"/>LOCATION_TYPE_CHOICES = [</text:p>
      <text:p text:style-name="Text_20_body"><text:s text:c="8"/>('store', <text:s text:c="5"/>'Store'),</text:p>
      <text:p text:style-name="Text_20_body"><text:s text:c="8"/>('branch', <text:s text:c="4"/>'Branch'),</text:p>
      <text:p text:style-name="Text_20_body"><text:s text:c="8"/>('warehouse', <text:s/>'Warehouse'),</text:p>
      <text:p text:style-name="Text_20_body"><text:s text:c="8"/>('office', <text:s text:c="4"/>'Office'),</text:p>
      <text:p text:style-name="Text_20_body"><text:s text:c="4"/>]</text:p>
      <text:p text:style-name="Text_20_body"/>
      <text:p text:style-name="Text_20_body"><text:s text:c="4"/>client <text:s text:c="7"/>= models.ForeignKey('Client', on_delete=models.CASCADE, related_name='locations')</text:p>
      <text:p text:style-name="Text_20_body"><text:s text:c="4"/>location_id <text:s text:c="2"/>= LowercaseCharField(max_length=50)</text:p>
      <text:p text:style-name="Text_20_body"><text:s text:c="4"/>name <text:s text:c="9"/>= models.CharField(max_length=100)</text:p>
      <text:p text:style-name="Text_20_body"><text:s text:c="4"/>location_type = models.CharField(max_length=20, choices=LOCATION_TYPE_CHOICES, default='store')</text:p>
      <text:p text:style-name="Text_20_body"><text:s text:c="4"/>is_active <text:s text:c="4"/>= models.BooleanField(default=True)</text:p>
      <text:p text:style-name="Text_20_body"/>
      <text:p text:style-name="Text_20_body"><text:s text:c="4"/>class Meta:</text:p>
      <text:p text:style-name="Text_20_body"><text:s text:c="8"/>unique_together = ('client', 'location_id')</text:p>
      <text:p text:style-name="Text_20_body"><text:s text:c="8"/>ordering <text:s text:c="7"/>= ['client', 'location_id']</text:p>
      <text:p text:style-name="Text_20_body"/>
      <text:p text:style-name="Text_20_body"><text:s text:c="4"/>def __str__(self):</text:p>
      <text:p text:style-name="Text_20_body"><text:s text:c="8"/>return f"{self.client.client_id} / {self.location_id} ({self.location_type})"</text:p>
      <text:p text:style-name="Text_20_body"/>
      <text:p text:style-name="Text_20_body"/>
      <text:p text:style-name="Text_20_body"># ── Client Group ──────────────────────────────────────────────────────</text:p>
      <text:p text:style-name="Text_20_body"/>
      <text:p text:style-name="Text_20_body"><text:soft-page-break/>class ClientGroup(models.Model):</text:p>
      <text:p text:style-name="Text_20_body"><text:s text:c="4"/>"""</text:p>
      <text:p text:style-name="Text_20_body"><text:s text:c="4"/>A named group within a client — like Django's Group but client-scoped.</text:p>
      <text:p text:style-name="Text_20_body"><text:s text:c="4"/>e.g. 'Warehouse Staff', 'Billing Team', 'Store A Managers'</text:p>
      <text:p text:style-name="Text_20_body"><text:s text:c="4"/>Multiple users can be assigned to one group.</text:p>
      <text:p text:style-name="Text_20_body"><text:s text:c="4"/>"""</text:p>
      <text:p text:style-name="Text_20_body"><text:s text:c="4"/>ROLE_CHOICES = [</text:p>
      <text:p text:style-name="Text_20_body"><text:s text:c="8"/>('admin', <text:s/>'Client Admin'), <text:s text:c="2"/># manage users/groups, full access</text:p>
      <text:p text:style-name="Text_20_body"><text:s text:c="8"/>('staff', <text:s/>'Client Staff'), <text:s text:c="2"/># access controlled per module</text:p>
      <text:p text:style-name="Text_20_body"><text:s text:c="8"/>('viewer', 'Client Viewer'), <text:s/># read-only on permitted modules</text:p>
      <text:p text:style-name="Text_20_body"><text:s text:c="4"/>]</text:p>
      <text:p text:style-name="Text_20_body"/>
      <text:p text:style-name="Text_20_body"><text:s text:c="4"/>client <text:s text:c="5"/>= models.ForeignKey('Client', on_delete=models.CASCADE, related_name='groups')</text:p>
      <text:p text:style-name="Text_20_body"><text:s text:c="4"/>group_id <text:s text:c="3"/>= LowercaseCharField(max_length=50)</text:p>
      <text:p text:style-name="Text_20_body"><text:s text:c="4"/>name <text:s text:c="7"/>= models.CharField(max_length=100)</text:p>
      <text:p text:style-name="Text_20_body"><text:s text:c="4"/>role <text:s text:c="7"/>= models.CharField(max_length=20, choices=ROLE_CHOICES, default='staff')</text:p>
      <text:p text:style-name="Text_20_body"><text:s text:c="4"/>description = models.CharField(max_length=300, blank=True)</text:p>
      <text:p text:style-name="Text_20_body"><text:s text:c="4"/>is_active <text:s text:c="2"/>= models.BooleanField(default=True)</text:p>
      <text:p text:style-name="Text_20_body"/>
      <text:p text:style-name="Text_20_body"><text:s text:c="4"/># Location scope — empty means access to ALL locations</text:p>
      <text:p text:style-name="Text_20_body"><text:s text:c="4"/>locations <text:s text:c="2"/>= models.ManyToManyField(</text:p>
      <text:p text:style-name="Text_20_body"><text:s text:c="8"/>ClientLocation,</text:p>
      <text:p text:style-name="Text_20_body"><text:s text:c="8"/>blank=True,</text:p>
      <text:p text:style-name="Text_20_body"><text:s text:c="8"/>related_name='groups',</text:p>
      <text:p text:style-name="Text_20_body"><text:s text:c="8"/>help_text='Leave empty to grant access to all locations'</text:p>
      <text:p text:style-name="Text_20_body"><text:s text:c="4"/>)</text:p>
      <text:p text:style-name="Text_20_body"/>
      <text:p text:style-name="Text_20_body"><text:s text:c="4"/>class Meta:</text:p>
      <text:p text:style-name="Text_20_body"><text:s text:c="8"/>unique_together = ('client', 'group_id')</text:p>
      <text:p text:style-name="Text_20_body"><text:s text:c="8"/>ordering <text:s text:c="7"/>= ['client', 'group_id']</text:p>
      <text:p text:style-name="Text_20_body"><text:soft-page-break/></text:p>
      <text:p text:style-name="Text_20_body"><text:s text:c="4"/>def __str__(self):</text:p>
      <text:p text:style-name="Text_20_body"><text:s text:c="8"/>return f"{self.client.client_id} / {self.name} ({self.role})"</text:p>
      <text:p text:style-name="Text_20_body"/>
      <text:p text:style-name="Text_20_body"><text:s text:c="4"/>def has_location_access(self, location):</text:p>
      <text:p text:style-name="Text_20_body"><text:s text:c="8"/>"""Empty locations = all access. Otherwise check membership."""</text:p>
      <text:p text:style-name="Text_20_body"><text:s text:c="8"/>if not self.locations.exists():</text:p>
      <text:p text:style-name="Text_20_body"><text:s text:c="12"/>return True</text:p>
      <text:p text:style-name="Text_20_body"><text:s text:c="8"/>return self.locations.filter(pk=location.pk).exists()</text:p>
      <text:p text:style-name="Text_20_body"/>
      <text:p text:style-name="Text_20_body"/>
      <text:p text:style-name="Text_20_body"># ── Module Permissions per Group ──────────────────────────────────────</text:p>
      <text:p text:style-name="Text_20_body"/>
      <text:p text:style-name="Text_20_body">class ClientGroupPermission(models.Model):</text:p>
      <text:p text:style-name="Text_20_body"><text:s text:c="4"/>MODULE_CHOICES = [</text:p>
      <text:p text:style-name="Text_20_body"><text:s text:c="8"/># CMS</text:p>
      <text:p text:style-name="Text_20_body"><text:s text:c="8"/>('cms', <text:s text:c="6"/>'CMS (Pages, Themes)'),</text:p>
      <text:p text:style-name="Text_20_body"><text:s text:c="8"/># Commerce</text:p>
      <text:p text:style-name="Text_20_body"><text:s text:c="8"/>('cart', <text:s text:c="5"/>'Shopping Cart'),</text:p>
      <text:p text:style-name="Text_20_body"><text:s text:c="8"/>('quotation', 'Quotations'),</text:p>
      <text:p text:style-name="Text_20_body"><text:s text:c="8"/>('order', <text:s text:c="4"/>'Orders'),</text:p>
      <text:p text:style-name="Text_20_body"><text:s text:c="8"/>('delivery', <text:s/>'Delivery'),</text:p>
      <text:p text:style-name="Text_20_body"><text:s text:c="8"/>('shipment', <text:s/>'Shipments'),</text:p>
      <text:p text:style-name="Text_20_body"><text:s text:c="8"/>('billing', <text:s text:c="2"/>'Billing'),</text:p>
      <text:p text:style-name="Text_20_body"><text:s text:c="4"/>]</text:p>
      <text:p text:style-name="Text_20_body"/>
      <text:p text:style-name="Text_20_body"><text:s text:c="4"/>ACTION_CHOICES = [</text:p>
      <text:p text:style-name="Text_20_body"><text:s text:c="8"/>('view', <text:s text:c="2"/>'View'),</text:p>
      <text:p text:style-name="Text_20_body"><text:s text:c="8"/>('create', 'Create'),</text:p>
      <text:p text:style-name="Text_20_body"><text:soft-page-break/><text:s text:c="8"/>('edit', <text:s text:c="2"/>'Edit'),</text:p>
      <text:p text:style-name="Text_20_body"><text:s text:c="8"/>('delete', 'Delete'),</text:p>
      <text:p text:style-name="Text_20_body"><text:s text:c="4"/>]</text:p>
      <text:p text:style-name="Text_20_body"/>
      <text:p text:style-name="Text_20_body"><text:s text:c="4"/>group <text:s/>= models.ForeignKey(ClientGroup, on_delete=models.CASCADE, related_name='permissions')</text:p>
      <text:p text:style-name="Text_20_body"><text:s text:c="4"/>module = models.CharField(max_length=30, choices=MODULE_CHOICES)</text:p>
      <text:p text:style-name="Text_20_body"><text:s text:c="4"/>action = models.CharField(max_length=10, choices=ACTION_CHOICES)</text:p>
      <text:p text:style-name="Text_20_body"/>
      <text:p text:style-name="Text_20_body"><text:s text:c="4"/>class Meta:</text:p>
      <text:p text:style-name="Text_20_body"><text:s text:c="8"/>unique_together = ('group', 'module', 'action')</text:p>
      <text:p text:style-name="Text_20_body"><text:s text:c="8"/>ordering <text:s text:c="7"/>= ['group', 'module', 'action']</text:p>
      <text:p text:style-name="Text_20_body"/>
      <text:p text:style-name="Text_20_body"><text:s text:c="4"/>def __str__(self):</text:p>
      <text:p text:style-name="Text_20_body"><text:s text:c="8"/>return f"{self.group} | {self.module}.{self.action}"</text:p>
      <text:p text:style-name="Text_20_body"/>
      <text:p text:style-name="Text_20_body"/>
      <text:p text:style-name="Text_20_body"># ── User → Group assignment ───────────────────────────────────────────</text:p>
      <text:p text:style-name="Text_20_body"/>
      <text:p text:style-name="Text_20_body">class ClientUserMembership(models.Model):</text:p>
      <text:p text:style-name="Text_20_body"><text:s text:c="4"/>"""</text:p>
      <text:p text:style-name="Text_20_body"><text:s text:c="4"/>Assigns a user to a ClientGroup.</text:p>
      <text:p text:style-name="Text_20_body"><text:s text:c="4"/>A user can belong to multiple groups within the same client</text:p>
      <text:p text:style-name="Text_20_body"><text:s text:c="4"/>(permissions are unioned across groups).</text:p>
      <text:p text:style-name="Text_20_body"><text:s text:c="4"/>"""</text:p>
      <text:p text:style-name="Text_20_body"><text:s text:c="4"/>user <text:s/>= models.ForeignKey(User, on_delete=models.CASCADE, related_name='client_memberships')</text:p>
      <text:p text:style-name="Text_20_body"><text:s text:c="4"/>group = models.ForeignKey(ClientGroup, on_delete=models.CASCADE, related_name='memberships')</text:p>
      <text:p text:style-name="Text_20_body"/>
      <text:p text:style-name="Text_20_body"><text:soft-page-break/><text:s text:c="4"/>class Meta:</text:p>
      <text:p text:style-name="Text_20_body"><text:s text:c="8"/>unique_together = ('user', 'group')</text:p>
      <text:p text:style-name="Text_20_body"><text:s text:c="8"/>ordering <text:s text:c="7"/>= ['group__client', 'user']</text:p>
      <text:p text:style-name="Text_20_body"/>
      <text:p text:style-name="Text_20_body"><text:s text:c="4"/>def __str__(self):</text:p>
      <text:p text:style-name="Text_20_body"><text:s text:c="8"/>return f"{self.user.username} → {self.group}"</text:p>
      <text:p text:style-name="Text_20_body"/>
      <text:h text:style-name="Heading_20_2" text:outline-level="2">Permission helper</text:h>
      <text:p text:style-name="Text_20_body"># utils/permissions.py</text:p>
      <text:p text:style-name="Text_20_body">from django.core.cache import cache</text:p>
      <text:p text:style-name="Text_20_body">from mysite.models import ClientLocation, ClientGroup, ClientGroupPermission, ClientUserMembership </text:p>
      <text:p text:style-name="Text_20_body"/>
      <text:p text:style-name="Text_20_body"/>
      <text:p text:style-name="Text_20_body">def _get_user_groups(user, client):</text:p>
      <text:p text:style-name="Text_20_body"><text:s text:c="4"/>"""</text:p>
      <text:p text:style-name="Text_20_body"><text:s text:c="4"/>All active groups this user belongs to for this client.</text:p>
      <text:p text:style-name="Text_20_body"><text:s text:c="4"/>Cached per request if request object passed, else short-lived cache.</text:p>
      <text:p text:style-name="Text_20_body"><text:s text:c="4"/>"""</text:p>
      <text:p text:style-name="Text_20_body"><text:s text:c="4"/>cache_key = f"user_groups:{user.pk}:{client.pk}"</text:p>
      <text:p text:style-name="Text_20_body"><text:s text:c="4"/>groups = cache.get(cache_key)</text:p>
      <text:p text:style-name="Text_20_body"><text:s text:c="4"/>if groups is None:</text:p>
      <text:p text:style-name="Text_20_body"><text:s text:c="8"/>groups = list(</text:p>
      <text:p text:style-name="Text_20_body"><text:s text:c="12"/>ClientGroup.objects.filter(</text:p>
      <text:p text:style-name="Text_20_body"><text:s text:c="16"/>memberships__user=user,</text:p>
      <text:p text:style-name="Text_20_body"><text:s text:c="16"/>client=client,</text:p>
      <text:p text:style-name="Text_20_body"><text:s text:c="16"/>is_active=True,</text:p>
      <text:p text:style-name="Text_20_body"><text:s text:c="12"/>).prefetch_related('permissions', 'locations')</text:p>
      <text:p text:style-name="Text_20_body"><text:s text:c="8"/>)</text:p>
      <text:p text:style-name="Text_20_body"><text:soft-page-break/><text:s text:c="8"/>cache.set(cache_key, groups, 300) <text:s/># 5 min</text:p>
      <text:p text:style-name="Text_20_body"><text:s text:c="4"/>return groups</text:p>
      <text:p text:style-name="Text_20_body"/>
      <text:p text:style-name="Text_20_body"/>
      <text:p text:style-name="Text_20_body">def has_module_perm(user, client, module, action, location=None):</text:p>
      <text:p text:style-name="Text_20_body"><text:s text:c="4"/>"""</text:p>
      <text:p text:style-name="Text_20_body"><text:s text:c="4"/>Check if user can perform action on module, optionally scoped to a location.</text:p>
      <text:p text:style-name="Text_20_body"/>
      <text:p text:style-name="Text_20_body"><text:s text:c="4"/>Usage:</text:p>
      <text:p text:style-name="Text_20_body"><text:s text:c="8"/>has_module_perm(request.user, client, 'order', 'edit')</text:p>
      <text:p text:style-name="Text_20_body"><text:s text:c="8"/>has_module_perm(request.user, client, 'order', 'edit', location=store_a)</text:p>
      <text:p text:style-name="Text_20_body"><text:s text:c="4"/>"""</text:p>
      <text:p text:style-name="Text_20_body"><text:s text:c="4"/>if user.is_superuser:</text:p>
      <text:p text:style-name="Text_20_body"><text:s text:c="8"/>return True</text:p>
      <text:p text:style-name="Text_20_body"/>
      <text:p text:style-name="Text_20_body"><text:s text:c="4"/>groups = _get_user_groups(user, client)</text:p>
      <text:p text:style-name="Text_20_body"><text:s text:c="4"/>if not groups:</text:p>
      <text:p text:style-name="Text_20_body"><text:s text:c="8"/>return False</text:p>
      <text:p text:style-name="Text_20_body"/>
      <text:p text:style-name="Text_20_body"><text:s text:c="4"/>for group in groups:</text:p>
      <text:p text:style-name="Text_20_body"><text:s text:c="8"/># Admin role bypasses module checks</text:p>
      <text:p text:style-name="Text_20_body"><text:s text:c="8"/>if group.role == 'admin':</text:p>
      <text:p text:style-name="Text_20_body"><text:s text:c="12"/>if location is None or group.has_location_access(location):</text:p>
      <text:p text:style-name="Text_20_body"><text:s text:c="16"/>return True</text:p>
      <text:p text:style-name="Text_20_body"/>
      <text:p text:style-name="Text_20_body"><text:s text:c="8"/># Viewer role can only view</text:p>
      <text:p text:style-name="Text_20_body"><text:s text:c="8"/>if group.role == 'viewer' and action != 'view':</text:p>
      <text:p text:style-name="Text_20_body"><text:s text:c="12"/>continue</text:p>
      <text:p text:style-name="Text_20_body"/>
      <text:p text:style-name="Text_20_body"><text:s text:c="8"/># Check module permission</text:p>
      <text:p text:style-name="Text_20_body"><text:soft-page-break/><text:s text:c="8"/>has_perm = any(</text:p>
      <text:p text:style-name="Text_20_body"><text:s text:c="12"/>p.module == module and p.action == action</text:p>
      <text:p text:style-name="Text_20_body"><text:s text:c="12"/>for p in group.permissions.all()</text:p>
      <text:p text:style-name="Text_20_body"><text:s text:c="8"/>)</text:p>
      <text:p text:style-name="Text_20_body"><text:s text:c="8"/>if not has_perm:</text:p>
      <text:p text:style-name="Text_20_body"><text:s text:c="12"/>continue</text:p>
      <text:p text:style-name="Text_20_body"/>
      <text:p text:style-name="Text_20_body"><text:s text:c="8"/># Check location scope</text:p>
      <text:p text:style-name="Text_20_body"><text:s text:c="8"/>if location is not None and not group.has_location_access(location):</text:p>
      <text:p text:style-name="Text_20_body"><text:s text:c="12"/>continue</text:p>
      <text:p text:style-name="Text_20_body"/>
      <text:p text:style-name="Text_20_body"><text:s text:c="8"/>return True</text:p>
      <text:p text:style-name="Text_20_body"/>
      <text:p text:style-name="Text_20_body"><text:s text:c="4"/>return False</text:p>
      <text:p text:style-name="Text_20_body"/>
      <text:p text:style-name="Text_20_body"/>
      <text:p text:style-name="Text_20_body">def get_user_permissions(user, client):</text:p>
      <text:p text:style-name="Text_20_body"><text:s text:c="4"/>"""</text:p>
      <text:p text:style-name="Text_20_body"><text:s text:c="4"/>Returns dict of all permissions the user has for a client.</text:p>
      <text:p text:style-name="Text_20_body"><text:s text:c="4"/>Unions permissions across all groups.</text:p>
      <text:p text:style-name="Text_20_body"/>
      <text:p text:style-name="Text_20_body"><text:s text:c="4"/>Returns:</text:p>
      <text:p text:style-name="Text_20_body"><text:s text:c="4"/>{</text:p>
      <text:p text:style-name="Text_20_body"><text:s text:c="8"/>'role': 'staff', <text:s text:c="23"/># highest role across groups</text:p>
      <text:p text:style-name="Text_20_body"><text:s text:c="8"/>'modules': {('order', 'edit'), ...}, <text:s text:c="3"/># unioned module+action pairs</text:p>
      <text:p text:style-name="Text_20_body"><text:s text:c="8"/>'locations': ['store_a', 'store_b'], <text:s text:c="3"/># [] means all locations</text:p>
      <text:p text:style-name="Text_20_body"><text:s text:c="8"/>'all_locations': True/False,</text:p>
      <text:p text:style-name="Text_20_body"><text:s text:c="4"/>}</text:p>
      <text:p text:style-name="Text_20_body"><text:s text:c="4"/>"""</text:p>
      <text:p text:style-name="Text_20_body"><text:s text:c="4"/>if user.is_superuser:</text:p>
      <text:p text:style-name="Text_20_body"><text:soft-page-break/><text:s text:c="8"/>return {</text:p>
      <text:p text:style-name="Text_20_body"><text:s text:c="12"/>'role': <text:s text:c="9"/>'admin',</text:p>
      <text:p text:style-name="Text_20_body"><text:s text:c="12"/>'modules': <text:s text:c="6"/>{(m, a) for m, _ in ClientGroupPermission.MODULE_CHOICES</text:p>
      <text:p text:style-name="Text_20_body"><text:s text:c="30"/>for a, _ in ClientGroupPermission.ACTION_CHOICES},</text:p>
      <text:p text:style-name="Text_20_body"><text:s text:c="12"/>'locations': <text:s text:c="4"/>[],</text:p>
      <text:p text:style-name="Text_20_body"><text:s text:c="12"/>'all_locations': True,</text:p>
      <text:p text:style-name="Text_20_body"><text:s text:c="8"/>}</text:p>
      <text:p text:style-name="Text_20_body"/>
      <text:p text:style-name="Text_20_body"><text:s text:c="4"/>groups = _get_user_groups(user, client)</text:p>
      <text:p text:style-name="Text_20_body"><text:s text:c="4"/>if not groups:</text:p>
      <text:p text:style-name="Text_20_body"><text:s text:c="8"/>return {'role': None, 'modules': set(), 'locations': [], 'all_locations': False}</text:p>
      <text:p text:style-name="Text_20_body"/>
      <text:p text:style-name="Text_20_body"><text:s text:c="4"/># Determine highest role across all groups</text:p>
      <text:p text:style-name="Text_20_body"><text:s text:c="4"/>role_rank <text:s/>= {'viewer': 1, 'staff': 2, 'admin': 3}</text:p>
      <text:p text:style-name="Text_20_body"><text:s text:c="4"/>top_role <text:s text:c="2"/>= max(groups, key=lambda g: role_rank.get(g.role, 0)).role</text:p>
      <text:p text:style-name="Text_20_body"/>
      <text:p text:style-name="Text_20_body"><text:s text:c="4"/># Union all module permissions</text:p>
      <text:p text:style-name="Text_20_body"><text:s text:c="4"/>modules = set()</text:p>
      <text:p text:style-name="Text_20_body"><text:s text:c="4"/>for group in groups:</text:p>
      <text:p text:style-name="Text_20_body"><text:s text:c="8"/>if group.role == 'admin':</text:p>
      <text:p text:style-name="Text_20_body"><text:s text:c="12"/>modules = {(m, a) for m, _ in ClientGroupPermission.MODULE_CHOICES</text:p>
      <text:p text:style-name="Text_20_body"><text:s text:c="23"/>for a, _ in ClientGroupPermission.ACTION_CHOICES}</text:p>
      <text:p text:style-name="Text_20_body"><text:s text:c="12"/>break</text:p>
      <text:p text:style-name="Text_20_body"><text:s text:c="8"/>for p in group.permissions.all():</text:p>
      <text:p text:style-name="Text_20_body"><text:s text:c="12"/>modules.add((p.module, p.action))</text:p>
      <text:p text:style-name="Text_20_body"/>
      <text:p text:style-name="Text_20_body"><text:s text:c="4"/># Union locations — if any group has no location restriction, user gets all</text:p>
      <text:p text:style-name="Text_20_body"><text:s text:c="4"/>all_locations = any(not g.locations.exists() for g in groups)</text:p>
      <text:p text:style-name="Text_20_body"><text:s text:c="4"/>location_ids <text:s/>= []</text:p>
      <text:p text:style-name="Text_20_body"><text:s text:c="4"/>if not all_locations:</text:p>
      <text:p text:style-name="Text_20_body"><text:soft-page-break/><text:s text:c="8"/>seen = set()</text:p>
      <text:p text:style-name="Text_20_body"><text:s text:c="8"/>for group in groups:</text:p>
      <text:p text:style-name="Text_20_body"><text:s text:c="12"/>for loc in group.locations.all():</text:p>
      <text:p text:style-name="Text_20_body"><text:s text:c="16"/>if loc.location_id not in seen:</text:p>
      <text:p text:style-name="Text_20_body"><text:s text:c="20"/>location_ids.append(loc.location_id)</text:p>
      <text:p text:style-name="Text_20_body"><text:s text:c="20"/>seen.add(loc.location_id)</text:p>
      <text:p text:style-name="Text_20_body"/>
      <text:p text:style-name="Text_20_body"><text:s text:c="4"/>return {</text:p>
      <text:p text:style-name="Text_20_body"><text:s text:c="8"/>'role': <text:s text:c="9"/>top_role,</text:p>
      <text:p text:style-name="Text_20_body"><text:s text:c="8"/>'modules': <text:s text:c="6"/>modules,</text:p>
      <text:p text:style-name="Text_20_body"><text:s text:c="8"/>'locations': <text:s text:c="4"/>location_ids,</text:p>
      <text:p text:style-name="Text_20_body"><text:s text:c="8"/>'all_locations': all_locations,</text:p>
      <text:p text:style-name="Text_20_body"><text:s text:c="4"/>}</text:p>
      <text:p text:style-name="Text_20_body"/>
      <text:h text:style-name="Heading_20_2" text:outline-level="2">Signals.py</text:h>
      <text:p text:style-name="Text_20_body"># signals.py</text:p>
      <text:p text:style-name="Text_20_body">from django.db.models.signals import post_save, post_delete</text:p>
      <text:p text:style-name="Text_20_body">from django.dispatch import receiver</text:p>
      <text:p text:style-name="Text_20_body">from django.core.cache import cache</text:p>
      <text:p text:style-name="Text_20_body">from guardian.shortcuts import assign_perm, remove_perm</text:p>
      <text:p text:style-name="Text_20_body">from .models import ClientUserMembership, ClientGroup</text:p>
      <text:p text:style-name="Text_20_body"/>
      <text:p text:style-name="Text_20_body">ALL_CLIENT_PERMS = [</text:p>
      <text:p text:style-name="Text_20_body"><text:s text:c="4"/>'view_client_data',</text:p>
      <text:p text:style-name="Text_20_body"><text:s text:c="4"/>'edit_client_data',</text:p>
      <text:p text:style-name="Text_20_body"><text:s text:c="4"/>'create_client_data',</text:p>
      <text:p text:style-name="Text_20_body"><text:s text:c="4"/>'admin_client_data',</text:p>
      <text:p text:style-name="Text_20_body">]</text:p>
      <text:p text:style-name="Text_20_body"/>
      <text:p text:style-name="Text_20_body"><text:soft-page-break/>ROLE_GUARDIAN_PERMS = {</text:p>
      <text:p text:style-name="Text_20_body"><text:s text:c="4"/>'viewer': ['view_client_data'],</text:p>
      <text:p text:style-name="Text_20_body"><text:s text:c="4"/>'staff': <text:s/>['view_client_data', 'edit_client_data', 'create_client_data'],</text:p>
      <text:p text:style-name="Text_20_body"><text:s text:c="4"/>'admin': <text:s/>['view_client_data', 'edit_client_data', 'create_client_data', 'admin_client_data'],</text:p>
      <text:p text:style-name="Text_20_body">}</text:p>
      <text:p text:style-name="Text_20_body"/>
      <text:p text:style-name="Text_20_body"/>
      <text:p text:style-name="Text_20_body">def _sync_user_guardian_perms(user, client):</text:p>
      <text:p text:style-name="Text_20_body"><text:s text:c="4"/>"""</text:p>
      <text:p text:style-name="Text_20_body"><text:s text:c="4"/>Recompute guardian perms for a user on a client</text:p>
      <text:p text:style-name="Text_20_body"><text:s text:c="4"/>by taking the union across all their groups.</text:p>
      <text:p text:style-name="Text_20_body"><text:s text:c="4"/>"""</text:p>
      <text:p text:style-name="Text_20_body"><text:s text:c="4"/>groups = ClientGroup.objects.filter(</text:p>
      <text:p text:style-name="Text_20_body"><text:s text:c="8"/>memberships__user=user,</text:p>
      <text:p text:style-name="Text_20_body"><text:s text:c="8"/>client=client,</text:p>
      <text:p text:style-name="Text_20_body"><text:s text:c="8"/>is_active=True,</text:p>
      <text:p text:style-name="Text_20_body"><text:s text:c="4"/>)</text:p>
      <text:p text:style-name="Text_20_body"/>
      <text:p text:style-name="Text_20_body"><text:s text:c="4"/># Union guardian perms across all groups</text:p>
      <text:p text:style-name="Text_20_body"><text:s text:c="4"/>perms_to_grant = set()</text:p>
      <text:p text:style-name="Text_20_body"><text:s text:c="4"/>for group in groups:</text:p>
      <text:p text:style-name="Text_20_body"><text:s text:c="8"/>perms_to_grant.update(ROLE_GUARDIAN_PERMS.get(group.role, []))</text:p>
      <text:p text:style-name="Text_20_body"/>
      <text:p text:style-name="Text_20_body"><text:s text:c="4"/># Remove all then reassign</text:p>
      <text:p text:style-name="Text_20_body"><text:s text:c="4"/>for perm in ALL_CLIENT_PERMS:</text:p>
      <text:p text:style-name="Text_20_body"><text:s text:c="8"/>remove_perm(perm, user, client)</text:p>
      <text:p text:style-name="Text_20_body"><text:s text:c="4"/>for perm in perms_to_grant:</text:p>
      <text:p text:style-name="Text_20_body"><text:s text:c="8"/>assign_perm(perm, user, client)</text:p>
      <text:p text:style-name="Text_20_body"/>
      <text:p text:style-name="Text_20_body"><text:s text:c="4"/># is_staff needed for admin access</text:p>
      <text:p text:style-name="Text_20_body"><text:soft-page-break/><text:s text:c="4"/>should_be_staff = bool(perms_to_grant)</text:p>
      <text:p text:style-name="Text_20_body"><text:s text:c="4"/>if user.is_staff != should_be_staff and not user.is_superuser:</text:p>
      <text:p text:style-name="Text_20_body"><text:s text:c="8"/>user.is_staff = should_be_staff</text:p>
      <text:p text:style-name="Text_20_body"><text:s text:c="8"/>user.save(update_fields=['is_staff'])</text:p>
      <text:p text:style-name="Text_20_body"/>
      <text:p text:style-name="Text_20_body"/>
      <text:p text:style-name="Text_20_body">def _bust_user_group_cache(user, client):</text:p>
      <text:p text:style-name="Text_20_body"><text:s text:c="4"/>cache.delete(f"user_groups:{user.pk}:{client.pk}")</text:p>
      <text:p text:style-name="Text_20_body"/>
      <text:p text:style-name="Text_20_body"/>
      <text:p text:style-name="Text_20_body">@receiver(post_save, sender=ClientUserMembership)</text:p>
      <text:p text:style-name="Text_20_body">@receiver(post_delete, sender=ClientUserMembership)</text:p>
      <text:p text:style-name="Text_20_body">def membership_changed(sender, instance, **kwargs):</text:p>
      <text:p text:style-name="Text_20_body"><text:s text:c="4"/>user <text:s text:c="2"/>= instance.user</text:p>
      <text:p text:style-name="Text_20_body"><text:s text:c="4"/>client = instance.group.client</text:p>
      <text:p text:style-name="Text_20_body"><text:s text:c="4"/>_bust_user_group_cache(user, client)</text:p>
      <text:p text:style-name="Text_20_body"><text:s text:c="4"/>_sync_user_guardian_perms(user, client)</text:p>
      <text:p text:style-name="Text_20_body"/>
      <text:p text:style-name="Text_20_body"/>
      <text:p text:style-name="Text_20_body">@receiver(post_save, sender=ClientGroup)</text:p>
      <text:p text:style-name="Text_20_body">def group_changed(sender, instance, **kwargs):</text:p>
      <text:p text:style-name="Text_20_body"><text:s text:c="4"/># If group role changes, recompute perms for all members</text:p>
      <text:p text:style-name="Text_20_body"><text:s text:c="4"/>for membership in instance.memberships.select_related('user'):</text:p>
      <text:p text:style-name="Text_20_body"><text:s text:c="8"/>_bust_user_group_cache(membership.user, instance.client)</text:p>
      <text:p text:style-name="Text_20_body"><text:s text:c="8"/>_sync_user_guardian_perms(membership.user, instance.client)</text:p>
      <text:p text:style-name="Text_20_body"/>
      <text:h text:style-name="Heading_20_2" text:outline-level="2">admin.py</text:h>
      <text:p text:style-name="Text_20_body"># admin.py</text:p>
      <text:p text:style-name="Text_20_body"/>
      <text:p text:style-name="Text_20_body"><text:soft-page-break/>class ClientGroupPermissionInline(admin.TabularInline):</text:p>
      <text:p text:style-name="Text_20_body"><text:s text:c="4"/>model <text:s/>= ClientGroupPermission</text:p>
      <text:p text:style-name="Text_20_body"><text:s text:c="4"/>extra <text:s/>= 0</text:p>
      <text:p text:style-name="Text_20_body"><text:s text:c="4"/>fields = ('module', 'action')</text:p>
      <text:p text:style-name="Text_20_body"/>
      <text:p text:style-name="Text_20_body"/>
      <text:p text:style-name="Text_20_body">class ClientUserMembershipInline(admin.TabularInline):</text:p>
      <text:p text:style-name="Text_20_body"><text:s text:c="4"/>model <text:s/>= ClientUserMembership</text:p>
      <text:p text:style-name="Text_20_body"><text:s text:c="4"/>extra <text:s/>= 1</text:p>
      <text:p text:style-name="Text_20_body"><text:s text:c="4"/>fields = ('user',)</text:p>
      <text:p text:style-name="Text_20_body"><text:s text:c="4"/>raw_id_fields = ('user',)</text:p>
      <text:p text:style-name="Text_20_body"/>
      <text:p text:style-name="Text_20_body"/>
      <text:p text:style-name="Text_20_body">class ClientLocationInline(nested_admin.NestedTabularInline):</text:p>
      <text:p text:style-name="Text_20_body"><text:s text:c="4"/>model <text:s/>= ClientLocation</text:p>
      <text:p text:style-name="Text_20_body"><text:s text:c="4"/>extra <text:s/>= 0</text:p>
      <text:p text:style-name="Text_20_body"><text:s text:c="4"/>fields = ('location_id', 'name', 'location_type', 'is_active')</text:p>
      <text:p text:style-name="Text_20_body"/>
      <text:p text:style-name="Text_20_body"/>
      <text:p text:style-name="Text_20_body">@admin.register(ClientGroup)</text:p>
      <text:p text:style-name="Text_20_body">class ClientGroupAdmin(ClientScopedMixin, admin.ModelAdmin):</text:p>
      <text:p text:style-name="Text_20_body"><text:s text:c="4"/>inlines <text:s text:c="5"/>= [ClientGroupPermissionInline, ClientUserMembershipInline]</text:p>
      <text:p text:style-name="Text_20_body"><text:s text:c="4"/>list_display = ('name', 'client', 'role', 'is_active')</text:p>
      <text:p text:style-name="Text_20_body"><text:s text:c="4"/>list_filter <text:s/>= ('client', 'role', 'is_active')</text:p>
      <text:p text:style-name="Text_20_body"><text:s text:c="4"/>filter_horizontal = ('locations',) <text:s text:c="2"/># nice widget for M2M</text:p>
      <text:p text:style-name="Text_20_body"/>
      <text:p text:style-name="Text_20_body"><text:s text:c="4"/>def get_queryset(self, request):</text:p>
      <text:p text:style-name="Text_20_body"><text:s text:c="8"/>qs = super().get_queryset(request)</text:p>
      <text:p text:style-name="Text_20_body"><text:s text:c="8"/>if request.user.is_superuser:</text:p>
      <text:p text:style-name="Text_20_body"><text:s text:c="12"/>return qs</text:p>
      <text:p text:style-name="Text_20_body"><text:soft-page-break/><text:s text:c="8"/>return qs.filter(client_id__in=self._permitted_client_ids(request))</text:p>
      <text:p text:style-name="Text_20_body"/>
      <text:p text:style-name="Text_20_body"/>
      <text:p text:style-name="Text_20_body">@admin.register(ClientLocation)</text:p>
      <text:p text:style-name="Text_20_body">class ClientLocationAdmin(ClientScopedMixin, admin.ModelAdmin):</text:p>
      <text:p text:style-name="Text_20_body"><text:s text:c="4"/>list_display <text:s/>= ('location_id', 'name', 'client', 'location_type', 'is_active')</text:p>
      <text:p text:style-name="Text_20_body"><text:s text:c="4"/>list_filter <text:s text:c="2"/>= ('client', 'location_type', 'is_active')</text:p>
      <text:p text:style-name="Text_20_body"><text:s text:c="4"/>search_fields = ('location_id', 'name')</text:p>
      <text:p text:style-name="Text_20_body"/>
      <text:p text:style-name="Text_20_body"><text:s text:c="4"/>def get_queryset(self, request):</text:p>
      <text:p text:style-name="Text_20_body"><text:s text:c="8"/>qs = super().get_queryset(request)</text:p>
      <text:p text:style-name="Text_20_body"><text:s text:c="8"/>if request.user.is_superuser:</text:p>
      <text:p text:style-name="Text_20_body"><text:s text:c="12"/>return qs</text:p>
      <text:p text:style-name="Text_20_body"><text:s text:c="8"/>return qs.filter(client_id__in=self._permitted_client_ids(request))</text:p>
      <text:p text:style-name="Text_20_body"/>
      <text:h text:style-name="Heading_20_1" text:outline-level="1">Debugging Alternative code</text:h>
      <text:p text:style-name="Text_20_body">Alternatively, use Django's logger instead of <text:span text:style-name="Source_20_Text">print()</text:span> — it works regardless of how the server is started:</text:p>
      <text:p text:style-name="Text_20_body"># At the top of catalogue_queries.py and views/catalogue.py</text:p>
      <text:p text:style-name="Text_20_body">import logging</text:p>
      <text:p text:style-name="Text_20_body">logger = logging.getLogger(__name__)</text:p>
      <text:p text:style-name="Text_20_body"/>
      <text:p text:style-name="Text_20_body"># Replace print() with:</text:p>
      <text:p text:style-name="Text_20_body">logger.debug(f"DEBUG filters: node_ids={node_ids}, attr_values={attr_values}")</text:p>
      <text:p text:style-name="Text_20_body">Then add to <text:span text:style-name="Source_20_Text">settings/development.py</text:span>:</text:p>
      <text:p text:style-name="Text_20_body">LOGGING = {</text:p>
      <text:p text:style-name="Text_20_body"><text:s text:c="4"/>'version': 1,</text:p>
      <text:p text:style-name="Text_20_body"><text:s text:c="4"/>'disable_existing_loggers': False,</text:p>
      <text:p text:style-name="Text_20_body"><text:s text:c="4"/>'handlers': {</text:p>
      <text:p text:style-name="Text_20_body"><text:soft-page-break/><text:s text:c="8"/>'console': {</text:p>
      <text:p text:style-name="Text_20_body"><text:s text:c="12"/>'class': 'logging.StreamHandler',</text:p>
      <text:p text:style-name="Text_20_body"><text:s text:c="8"/>},</text:p>
      <text:p text:style-name="Text_20_body"><text:s text:c="4"/>},</text:p>
      <text:p text:style-name="Text_20_body"><text:s text:c="4"/>'loggers': {</text:p>
      <text:p text:style-name="Text_20_body"><text:s text:c="8"/>'mysite': { <text:s text:c="10"/># catches mysite.views.*, mysite.models.*</text:p>
      <text:p text:style-name="Text_20_body"><text:s text:c="12"/>'handlers': ['console'],</text:p>
      <text:p text:style-name="Text_20_body"><text:s text:c="12"/>'level': 'DEBUG',</text:p>
      <text:p text:style-name="Text_20_body"><text:s text:c="12"/>'propagate': False,</text:p>
      <text:p text:style-name="Text_20_body"><text:s text:c="8"/>},</text:p>
      <text:p text:style-name="Text_20_body"><text:s text:c="8"/>'utils': { <text:s text:c="11"/># catches utils.catalogue_queries etc.</text:p>
      <text:p text:style-name="Text_20_body"><text:s text:c="12"/>'handlers': ['console'],</text:p>
      <text:p text:style-name="Text_20_body"><text:s text:c="12"/>'level': 'DEBUG',</text:p>
      <text:p text:style-name="Text_20_body"><text:s text:c="12"/>'propagate': False,</text:p>
      <text:p text:style-name="Text_20_body"><text:s text:c="8"/>},</text:p>
      <text:p text:style-name="Text_20_body"><text:s text:c="4"/>},</text:p>
      <text:p text:style-name="Text_20_body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8:39:34.497704899</meta:creation-date>
    <dc:date>2026-05-08T16:04:57.958771614</dc:date>
    <meta:editing-duration>P7DT14H24M23S</meta:editing-duration>
    <meta:editing-cycles>60</meta:editing-cycles>
    <meta:generator>LibreOffice/25.2.5.2$Linux_X86_64 LibreOffice_project/520$Build-2</meta:generator>
    <meta:document-statistic meta:table-count="0" meta:image-count="1" meta:object-count="0" meta:page-count="38" meta:paragraph-count="886" meta:word-count="3713" meta:character-count="34110" meta:non-whitespace-character-count="27683"/>
  </office:meta>
</office:document-meta>
</file>